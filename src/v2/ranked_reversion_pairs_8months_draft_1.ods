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4598in"/>
    </style:style>
    <style:style style:name="co13" style:family="table-column">
      <style:table-column-properties fo:break-before="auto" style:column-width="1.5091in"/>
    </style:style>
    <style:style style:name="co14" style:family="table-column">
      <style:table-column-properties fo:break-before="auto" style:column-width="1.5374in"/>
    </style:style>
    <style:style style:name="co15" style:family="table-column">
      <style:table-column-properties fo:break-before="auto" style:column-width="0.63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84b04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380000000000001" calcext:value-type="float">
            <text:p>0.380000000000001</text:p>
          </table:table-cell>
          <table:table-cell table:style-name="ce8" office:value-type="float" office:value="0.380000000000001" calcext:value-type="float">
            <text:p>0.380000000000001</text:p>
          </table:table-cell>
          <table:table-cell office:value-type="float" office:value="0.0327022375215147" calcext:value-type="float">
            <text:p>0.0327022375215147</text:p>
          </table:table-cell>
          <table:table-cell table:style-name="ce9" office:value-type="float" office:value="0.0327022375215147" calcext:value-type="float">
            <text:p>0.032702237521514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B-ETH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0000000000001</text:p>
          </table:table-cell>
          <table:table-cell table:style-name="ce8" office:value-type="float" office:value="0.550000000000001" calcext:value-type="float">
            <text:p>0.550000000000001</text:p>
          </table:table-cell>
          <table:table-cell office:value-type="float" office:value="0.0408921933085502" calcext:value-type="float">
            <text:p>0.0408921933085502</text:p>
          </table:table-cell>
          <table:table-cell table:style-name="ce9" office:value-type="float" office:value="0.0408921933085502" calcext:value-type="float">
            <text:p>0.040892193308550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-ETH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style-name="ce8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37051532941944</text:p>
          </table:table-cell>
          <table:table-cell table:style-name="ce9" office:value-type="float" office:value="0.0437051532941944" calcext:value-type="float">
            <text:p>0.043705153294194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5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-0.789999999999999" calcext:value-type="float">
            <text:p>-0.789999999999999</text:p>
          </table:table-cell>
          <table:table-cell table:style-name="ce8" office:value-type="float" office:value="0.789999999999999" calcext:value-type="float">
            <text:p>0.789999999999999</text:p>
          </table:table-cell>
          <table:table-cell office:value-type="float" office:value="-0.0617670054730257" calcext:value-type="float">
            <text:p>-0.0617670054730257</text:p>
          </table:table-cell>
          <table:table-cell table:style-name="ce9" office:value-type="float" office:value="0.0617670054730257" calcext:value-type="float">
            <text:p>0.061767005473025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-1.24</text:p>
          </table:table-cell>
          <table:table-cell table:style-name="ce8" office:value-type="float" office:value="1.24" calcext:value-type="float">
            <text:p>1.24</text:p>
          </table:table-cell>
          <table:table-cell office:value-type="float" office:value="-0.0679824561403508" calcext:value-type="float">
            <text:p>-0.0679824561403508</text:p>
          </table:table-cell>
          <table:table-cell table:style-name="ce9" office:value-type="float" office:value="0.0679824561403508" calcext:value-type="float">
            <text:p>0.067982456140350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</text:p>
          </table:table-cell>
          <table:table-cell table:style-name="ce8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319498825372</text:p>
          </table:table-cell>
          <table:table-cell table:style-name="ce9" office:value-type="float" office:value="0.096319498825372" calcext:value-type="float">
            <text:p>0.096319498825372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UMP-LTC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-1.62</text:p>
          </table:table-cell>
          <table:table-cell table:style-name="ce8" office:value-type="float" office:value="1.62" calcext:value-type="float">
            <text:p>1.62</text:p>
          </table:table-cell>
          <table:table-cell office:value-type="float" office:value="-0.118942731277533" calcext:value-type="float">
            <text:p>-0.118942731277533</text:p>
          </table:table-cell>
          <table:table-cell office:value-type="float" office:value="0.118942731277533" calcext:value-type="float">
            <text:p>0.11894273127753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table:style-name="ce8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10471622701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RTCOIN-ETH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-1.75</text:p>
          </table:table-cell>
          <table:table-cell table:style-name="ce8" office:value-type="float" office:value="1.75" calcext:value-type="float">
            <text:p>1.75</text:p>
          </table:table-cell>
          <table:table-cell office:value-type="float" office:value="-0.127272727272727" calcext:value-type="float">
            <text:p>-0.127272727272727</text:p>
          </table:table-cell>
          <table:table-cell office:value-type="float" office:value="0.127272727272727" calcext:value-type="float">
            <text:p>0.12727272727272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FARTCOIN-SOL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-2.69</text:p>
          </table:table-cell>
          <table:table-cell table:style-name="ce1" office:value-type="float" office:value="2.69" calcext:value-type="float">
            <text:p>2.69</text:p>
          </table:table-cell>
          <table:table-cell office:value-type="float" office:value="-0.196493791088386" calcext:value-type="float">
            <text:p>-0.196493791088386</text:p>
          </table:table-cell>
          <table:table-cell office:value-type="float" office:value="0.196493791088386" calcext:value-type="float">
            <text:p>0.19649379108838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C-DOGE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-2.26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-0.130938586326767</text:p>
          </table:table-cell>
          <table:table-cell office:value-type="float" office:value="0.130938586326767" calcext:value-type="float">
            <text:p>0.13093858632676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5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188445667125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K-PEPE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367465975373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-4.05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-0.237536656891496</text:p>
          </table:table-cell>
          <table:table-cell office:value-type="float" office:value="0.237536656891496" calcext:value-type="float">
            <text:p>0.23753665689149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NB-BTC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589632829373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5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477184841454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BNB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397820163488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GE-SOL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5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-7.24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-0.376299376299376</text:p>
          </table:table-cell>
          <table:table-cell office:value-type="float" office:value="0.376299376299376" calcext:value-type="float">
            <text:p>0.37629937629937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NK-DOGE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818" calcext:value-type="float">
            <text:p>0.8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7725947521866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ONK-XMR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8986175115207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43135783946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21:56:59.19021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1T21:58:35.993142600</dc:date>
    <meta:editing-duration>PT13M12S</meta:editing-duration>
    <meta:editing-cycles>10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