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2937in"/>
    </style:style>
    <style:style style:name="co13" style:family="table-column">
      <style:table-column-properties fo:break-before="auto" style:column-width="1.5354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6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9" style:family="table-cell" style:parent-style-name="Default" style:data-style-name="N130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5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6" style:family="table-cell" style:parent-style-name="Default" style:data-style-name="N133">
      <style:table-cell-properties fo:background-color="#ffdbb6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7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0" style:family="table-cell" style:parent-style-name="Default" style:data-style-name="N133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2" style:family="table-cell" style:parent-style-name="Default" style:data-style-name="N139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default-cell-style-name="ce25"/>
        <table:table-column table:style-name="co10" table:default-cell-style-name="ce1"/>
        <table:table-column table:style-name="co11" table:default-cell-style-name="ce29"/>
        <table:table-column table:style-name="co12" table:default-cell-style-name="ce25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6368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  <table:table-cell table:style-name="ce1"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 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 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.57 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 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BONK-XMR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2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 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0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(1.24)</text:p>
          </table:table-cell>
          <table:table-cell table:style-name="ce30" office:value-type="float" office:value="1.24" calcext:value-type="float">
            <text:p>1.24</text:p>
          </table:table-cell>
          <table:table-cell office:value-type="float" office:value="-0.0679824561403508" calcext:value-type="float">
            <text:p>(0.068)</text:p>
          </table:table-cell>
          <table:table-cell table:style-name="ce32" office:value-type="float" office:value="0.0679824561403508" calcext:value-type="float">
            <text:p>0.06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9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office:value-type="float" office:value="2.46" calcext:value-type="float">
            <text:p>2.46 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4.07" calcext:value-type="float">
            <text:p>4.07 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 </text:p>
          </table:table-cell>
          <table:table-cell table:style-name="ce30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4 </text:p>
          </table:table-cell>
          <table:table-cell table:style-name="ce32" office:value-type="float" office:value="0.0437051532941944" calcext:value-type="float">
            <text:p>0.0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(2.26)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(0.131)</text:p>
          </table:table-cell>
          <table:table-cell office:value-type="float" office:value="0.130938586326767" calcext:value-type="float">
            <text:p>0.1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 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 </text:p>
          </table:table-cell>
          <table:table-cell table:style-name="ce30" office:value-type="float" office:value="0.550000000000001" calcext:value-type="float">
            <text:p>0.55</text:p>
          </table:table-cell>
          <table:table-cell office:value-type="float" office:value="0.0408921933085502" calcext:value-type="float">
            <text:p>0.041 </text:p>
          </table:table-cell>
          <table:table-cell table:style-name="ce32" office:value-type="float" office:value="0.0408921933085502" calcext:value-type="float">
            <text:p>0.04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 </text:p>
          </table:table-cell>
          <table:table-cell table:style-name="ce30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 </text:p>
          </table:table-cell>
          <table:table-cell table:style-name="ce32" office:value-type="float" office:value="0.096319498825372" calcext:value-type="float">
            <text:p>0.0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1.49" calcext:value-type="float">
            <text:p>1.49 </text:p>
          </table:table-cell>
          <table:table-cell table:style-name="ce30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0</text:p>
          </table:table-cell>
          <table:table-cell office:value-type="float" office:value="3.1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(4.05)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(0.238)</text:p>
          </table:table-cell>
          <table:table-cell office:value-type="float" office:value="0.237536656891496" calcext:value-type="float">
            <text:p>0.2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DOGE-SOL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9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(7.24)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(0.376)</text:p>
          </table:table-cell>
          <table:table-cell office:value-type="float" office:value="0.376299376299376" calcext:value-type="float">
            <text:p>0.37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ARTCOIN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2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(1.75)</text:p>
          </table:table-cell>
          <table:table-cell table:style-name="ce30" office:value-type="float" office:value="1.75" calcext:value-type="float">
            <text:p>1.75</text:p>
          </table:table-cell>
          <table:table-cell office:value-type="float" office:value="-0.127272727272727" calcext:value-type="float">
            <text:p>(0.127)</text:p>
          </table:table-cell>
          <table:table-cell office:value-type="float" office:value="0.127272727272727" calcext:value-type="float">
            <text:p>0.1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UMP-LTC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2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(1.62)</text:p>
          </table:table-cell>
          <table:table-cell table:style-name="ce30" office:value-type="float" office:value="1.62" calcext:value-type="float">
            <text:p>1.62</text:p>
          </table:table-cell>
          <table:table-cell office:value-type="float" office:value="-0.118942731277533" calcext:value-type="float">
            <text:p>(0.119)</text:p>
          </table:table-cell>
          <table:table-cell office:value-type="float" office:value="0.118942731277533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9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-0.789999999999999" calcext:value-type="float">
            <text:p>(0.79)</text:p>
          </table:table-cell>
          <table:table-cell table:style-name="ce30" office:value-type="float" office:value="0.789999999999999" calcext:value-type="float">
            <text:p>0.79</text:p>
          </table:table-cell>
          <table:table-cell office:value-type="float" office:value="-0.0617670054730257" calcext:value-type="float">
            <text:p>(0.062)</text:p>
          </table:table-cell>
          <table:table-cell table:style-name="ce32" office:value-type="float" office:value="0.0617670054730257" calcext:value-type="float">
            <text:p>0.0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380000000000001" calcext:value-type="float">
            <text:p>0.38 </text:p>
          </table:table-cell>
          <table:table-cell table:style-name="ce30" office:value-type="float" office:value="0.380000000000001" calcext:value-type="float">
            <text:p>0.38</text:p>
          </table:table-cell>
          <table:table-cell office:value-type="float" office:value="0.0327022375215147" calcext:value-type="float">
            <text:p>0.033 </text:p>
          </table:table-cell>
          <table:table-cell table:style-name="ce32" office:value-type="float" office:value="0.0327022375215147" calcext:value-type="float">
            <text:p>0.03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ARTCOIN-SOL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0</text:p>
          </table:table-cell>
          <table:table-cell table:style-name="ce27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(2.69)</text:p>
          </table:table-cell>
          <table:table-cell table:style-name="ce27" office:value-type="float" office:value="2.69" calcext:value-type="float">
            <text:p>2.69</text:p>
          </table:table-cell>
          <table:table-cell office:value-type="float" office:value="-0.196493791088386" calcext:value-type="float">
            <text:p>(0.196)</text:p>
          </table:table-cell>
          <table:table-cell office:value-type="float" office:value="0.196493791088386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number number:decimal-places="3" number:min-decimal-places="3" number:min-integer-digits="1" number:grouping="true"/>
    </number:number-style>
    <number:number-style style:name="N13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5P0"/>
    </number:number-style>
    <number:number-style style:name="N137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9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2:36:45.90094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6T12:37:07.209904000</dc:date>
    <meta:editing-duration>PT32M17S</meta:editing-duration>
    <meta:editing-cycles>26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