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fo:background-color="#158466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3">
      <style:table-cell-properties fo:background-color="#ff8000"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2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9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7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46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6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9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6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6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9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6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6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46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6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46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6" office:value-type="string" calcext:value-type="string">
            <text:p>CAKE-BNB</text:p>
          </table:table-cell>
          <table:table-cell table:style-name="ce46" office:value-type="float" office:value="14" calcext:value-type="float">
            <text:p>14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51" office:value-type="float" office:value="28.54" calcext:value-type="float">
            <text:p>28.54</text:p>
          </table:table-cell>
          <table:table-cell table:style-name="ce1" office:value-type="string" calcext:value-type="string">
            <text:p>[22.0, 36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46" office:value-type="float" office:value="10.56" calcext:value-type="float">
            <text:p>10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4" calcext:value-type="float">
            <text:p>-14.54</text:p>
          </table:table-cell>
          <table:table-cell table:style-name="ce51" office:value-type="float" office:value="14.54" calcext:value-type="float">
            <text:p>14.54</text:p>
          </table:table-cell>
          <table:table-cell table:style-name="ce61" office:value-type="float" office:value="-0.509460406447092" calcext:value-type="float">
            <text:p>-0.509460406447</text:p>
          </table:table-cell>
          <table:table-cell table:style-name="ce64" office:value-type="float" office:value="0.509460406447092" calcext:value-type="float">
            <text:p>0.50946040644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7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6" office:value-type="string" calcext:value-type="string">
            <text:p>BONK-BNB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9.51" calcext:value-type="float">
            <text:p>29.51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2.37" calcext:value-type="float">
            <text:p>22.37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6.51" calcext:value-type="float">
            <text:p>-16.51</text:p>
          </table:table-cell>
          <table:table-cell table:style-name="ce51" office:value-type="float" office:value="16.51" calcext:value-type="float">
            <text:p>16.51</text:p>
          </table:table-cell>
          <table:table-cell table:style-name="ce61" office:value-type="float" office:value="-0.559471365638767" calcext:value-type="float">
            <text:p>-0.559471365639</text:p>
          </table:table-cell>
          <table:table-cell table:style-name="ce64" office:value-type="float" office:value="0.559471365638767" calcext:value-type="float">
            <text:p>0.559471365639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9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104" calcext:value-type="float">
            <text:p>104</text:p>
          </table:table-cell>
          <table:table-cell table:style-name="ce46" office:value-type="string" calcext:value-type="string">
            <text:p>BNB-BTC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53" office:value-type="float" office:value="33.86" calcext:value-type="float">
            <text:p>33.86</text:p>
          </table:table-cell>
          <table:table-cell table:style-name="ce46" office:value-type="string" calcext:value-type="string">
            <text:p>[26.0, 41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6.36" calcext:value-type="float">
            <text:p>6.36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21.86" calcext:value-type="float">
            <text:p>-21.86</text:p>
          </table:table-cell>
          <table:table-cell table:style-name="ce51" office:value-type="float" office:value="21.86" calcext:value-type="float">
            <text:p>21.86</text:p>
          </table:table-cell>
          <table:table-cell table:style-name="ce19" office:value-type="float" office:value="-0.645599527466037" calcext:value-type="float">
            <text:p>-0.645599527466</text:p>
          </table:table-cell>
          <table:table-cell table:style-name="ce23" office:value-type="float" office:value="0.645599527466037" calcext:value-type="float">
            <text:p>0.645599527466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6" office:value-type="string" calcext:value-type="string">
            <text:p>JUP-BNB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0.714" calcext:value-type="float">
            <text:p>0.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46" office:value-type="string" calcext:value-type="string">
            <text:p>[24.0, 39.0]</text:p>
          </table:table-cell>
          <table:table-cell table:style-name="ce12" office:value-type="float" office:value="0.122" calcext:value-type="float">
            <text:p>0.122</text:p>
          </table:table-cell>
          <table:table-cell table:style-name="ce46" office:value-type="float" office:value="15.04" calcext:value-type="float">
            <text:p>15.04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19.58" calcext:value-type="float">
            <text:p>-19.58</text:p>
          </table:table-cell>
          <table:table-cell table:style-name="ce51" office:value-type="float" office:value="19.58" calcext:value-type="float">
            <text:p>19.58</text:p>
          </table:table-cell>
          <table:table-cell table:style-name="ce19" office:value-type="float" office:value="-0.620012666244459" calcext:value-type="float">
            <text:p>-0.620012666244</text:p>
          </table:table-cell>
          <table:table-cell table:style-name="ce23" office:value-type="float" office:value="0.620012666244459" calcext:value-type="float">
            <text:p>0.620012666244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6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3" calcext:value-type="float">
            <text:p>63</text:p>
          </table:table-cell>
          <table:table-cell table:style-name="ce46" office:value-type="string" calcext:value-type="string">
            <text:p>L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51" office:value-type="float" office:value="27.98" calcext:value-type="float">
            <text:p>27.98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46" office:value-type="float" office:value="9.39" calcext:value-type="float">
            <text:p>9.3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8" calcext:value-type="float">
            <text:p>-17.98</text:p>
          </table:table-cell>
          <table:table-cell table:style-name="ce51" office:value-type="float" office:value="17.98" calcext:value-type="float">
            <text:p>17.98</text:p>
          </table:table-cell>
          <table:table-cell table:style-name="ce19" office:value-type="float" office:value="-0.642601858470336" calcext:value-type="float">
            <text:p>-0.642601858470</text:p>
          </table:table-cell>
          <table:table-cell table:style-name="ce23" office:value-type="float" office:value="0.642601858470336" calcext:value-type="float">
            <text:p>0.642601858470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table:style-name="ce46" office:value-type="string" calcext:value-type="string">
            <text:p>E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0.667" calcext:value-type="float">
            <text:p>0.6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1" office:value-type="float" office:value="27.9" calcext:value-type="float">
            <text:p>27.90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46" office:value-type="float" office:value="10.31" calcext:value-type="float">
            <text:p>10.31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" calcext:value-type="float">
            <text:p>-17.90</text:p>
          </table:table-cell>
          <table:table-cell table:style-name="ce51" office:value-type="float" office:value="17.9" calcext:value-type="float">
            <text:p>17.90</text:p>
          </table:table-cell>
          <table:table-cell table:style-name="ce19" office:value-type="float" office:value="-0.6415770609319" calcext:value-type="float">
            <text:p>-0.641577060932</text:p>
          </table:table-cell>
          <table:table-cell table:style-name="ce23" office:value-type="float" office:value="0.6415770609319" calcext:value-type="float">
            <text:p>0.641577060932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20:38:31.05624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3T20:47:51.107794000</dc:date>
    <meta:editing-duration>PT1H6M28S</meta:editing-duration>
    <meta:editing-cycles>65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