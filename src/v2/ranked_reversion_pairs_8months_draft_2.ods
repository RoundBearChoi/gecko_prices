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63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dde8cb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bbe33d"/>
    </style:style>
    <style:style style:name="ce19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16" office:value-type="float" office:value="23" calcext:value-type="float">
            <text:p>23</text:p>
          </table:table-cell>
          <table:table-cell table:style-name="ce17" office:value-type="float" office:value="0.917" calcext:value-type="float">
            <text:p>0.9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</text:p>
          </table:table-cell>
          <table:table-cell table:style-name="ce21" office:value-type="float" office:value="3.35" calcext:value-type="float">
            <text:p>3.35</text:p>
          </table:table-cell>
          <table:table-cell table:number-columns-repeated="2" office:value-type="float" office:value="0.170483460559797" calcext:value-type="float">
            <text:p>0.17048346055979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BONK-DOGE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.818" calcext:value-type="float">
            <text:p>0.8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</text:p>
          </table:table-cell>
          <table:table-cell table:style-name="ce21" office:value-type="float" office:value="2.58" calcext:value-type="float">
            <text:p>2.58</text:p>
          </table:table-cell>
          <table:table-cell table:number-columns-repeated="2" office:value-type="float" office:value="0.148105625717566" calcext:value-type="float">
            <text:p>0.14810562571756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NK-PEPE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18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-2.54</text:p>
          </table:table-cell>
          <table:table-cell table:style-name="ce21" office:value-type="float" office:value="2.54" calcext:value-type="float">
            <text:p>2.54</text:p>
          </table:table-cell>
          <table:table-cell office:value-type="float" office:value="-0.117920148560817" calcext:value-type="float">
            <text:p>-0.117920148560817</text:p>
          </table:table-cell>
          <table:table-cell office:value-type="float" office:value="0.117920148560817" calcext:value-type="float">
            <text:p>0.11792014856081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B-BTC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</text:p>
          </table:table-cell>
          <table:table-cell office:value-type="float" office:value="3.21" calcext:value-type="float">
            <text:p>3.21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0.0599999999999987" calcext:value-type="float">
            <text:p>0.0599999999999987</text:p>
          </table:table-cell>
          <table:table-cell table:style-name="ce21" office:value-type="float" office:value="0.0599999999999987" calcext:value-type="float">
            <text:p>0.0599999999999987</text:p>
          </table:table-cell>
          <table:table-cell table:number-columns-repeated="2" office:value-type="float" office:value="0.0033444816053511" calcext:value-type="float">
            <text:p>0.003344481605351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18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-4.15</text:p>
          </table:table-cell>
          <table:table-cell table:style-name="ce21" office:value-type="float" office:value="4.15" calcext:value-type="float">
            <text:p>4.15</text:p>
          </table:table-cell>
          <table:table-cell office:value-type="float" office:value="-0.196217494089834" calcext:value-type="float">
            <text:p>-0.196217494089834</text:p>
          </table:table-cell>
          <table:table-cell office:value-type="float" office:value="0.196217494089834" calcext:value-type="float">
            <text:p>0.1962174940898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-2.53</text:p>
          </table:table-cell>
          <table:table-cell table:style-name="ce21" office:value-type="float" office:value="2.53" calcext:value-type="float">
            <text:p>2.53</text:p>
          </table:table-cell>
          <table:table-cell office:value-type="float" office:value="-0.129544290834613" calcext:value-type="float">
            <text:p>-0.129544290834613</text:p>
          </table:table-cell>
          <table:table-cell office:value-type="float" office:value="0.129544290834613" calcext:value-type="float">
            <text:p>0.12954429083461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-4.5</text:p>
          </table:table-cell>
          <table:table-cell table:style-name="ce21" office:value-type="float" office:value="4.5" calcext:value-type="float">
            <text:p>4.5</text:p>
          </table:table-cell>
          <table:table-cell office:value-type="float" office:value="-0.209302325581395" calcext:value-type="float">
            <text:p>-0.209302325581395</text:p>
          </table:table-cell>
          <table:table-cell office:value-type="float" office:value="0.209302325581395" calcext:value-type="float">
            <text:p>0.20930232558139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L-ETH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-4.17</text:p>
          </table:table-cell>
          <table:table-cell table:style-name="ce21" office:value-type="float" office:value="4.17" calcext:value-type="float">
            <text:p>4.17</text:p>
          </table:table-cell>
          <table:table-cell office:value-type="float" office:value="-0.206742687159147" calcext:value-type="float">
            <text:p>-0.206742687159147</text:p>
          </table:table-cell>
          <table:table-cell office:value-type="float" office:value="0.206742687159147" calcext:value-type="float">
            <text:p>0.20674268715914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C-DOGE</text:p>
          </table:table-cell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-7.04</text:p>
          </table:table-cell>
          <table:table-cell office:value-type="float" office:value="7.04" calcext:value-type="float">
            <text:p>7.04</text:p>
          </table:table-cell>
          <table:table-cell office:value-type="float" office:value="-0.319419237749546" calcext:value-type="float">
            <text:p>-0.319419237749546</text:p>
          </table:table-cell>
          <table:table-cell office:value-type="float" office:value="0.319419237749546" calcext:value-type="float">
            <text:p>0.31941923774954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K-BNB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table:style-name="ce21" office:value-type="float" office:value="1.9" calcext:value-type="float">
            <text:p>1.9</text:p>
          </table:table-cell>
          <table:table-cell table:number-columns-repeated="2" office:value-type="float" office:value="0.145038167938931" calcext:value-type="float">
            <text:p>0.14503816793893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NB-ETH</text:p>
          </table:table-cell>
          <table:table-cell table:style-name="ce16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2.68" calcext:value-type="float">
            <text:p>-2.68</text:p>
          </table:table-cell>
          <table:table-cell table:style-name="ce21" office:value-type="float" office:value="2.68" calcext:value-type="float">
            <text:p>2.68</text:p>
          </table:table-cell>
          <table:table-cell office:value-type="float" office:value="-0.160671462829736" calcext:value-type="float">
            <text:p>-0.160671462829736</text:p>
          </table:table-cell>
          <table:table-cell office:value-type="float" office:value="0.160671462829736" calcext:value-type="float">
            <text:p>0.1606714628297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MR-BTC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-4.62</text:p>
          </table:table-cell>
          <table:table-cell table:style-name="ce21" office:value-type="float" office:value="4.62" calcext:value-type="float">
            <text:p>4.62</text:p>
          </table:table-cell>
          <table:table-cell office:value-type="float" office:value="-0.24812030075188" calcext:value-type="float">
            <text:p>-0.24812030075188</text:p>
          </table:table-cell>
          <table:table-cell office:value-type="float" office:value="0.24812030075188" calcext:value-type="float">
            <text:p>0.248120300751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-3.11</text:p>
          </table:table-cell>
          <table:table-cell table:style-name="ce21" office:value-type="float" office:value="3.11" calcext:value-type="float">
            <text:p>3.11</text:p>
          </table:table-cell>
          <table:table-cell office:value-type="float" office:value="-0.181765049678551" calcext:value-type="float">
            <text:p>-0.181765049678551</text:p>
          </table:table-cell>
          <table:table-cell office:value-type="float" office:value="0.181765049678551" calcext:value-type="float">
            <text:p>0.18176504967855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-9.04</text:p>
          </table:table-cell>
          <table:table-cell office:value-type="float" office:value="9.04" calcext:value-type="float">
            <text:p>9.04</text:p>
          </table:table-cell>
          <table:table-cell office:value-type="float" office:value="-0.41016333938294" calcext:value-type="float">
            <text:p>-0.41016333938294</text:p>
          </table:table-cell>
          <table:table-cell office:value-type="float" office:value="0.41016333938294" calcext:value-type="float">
            <text:p>0.410163339382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18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-12.85</text:p>
          </table:table-cell>
          <table:table-cell office:value-type="float" office:value="12.85" calcext:value-type="float">
            <text:p>12.85</text:p>
          </table:table-cell>
          <table:table-cell office:value-type="float" office:value="-0.517102615694165" calcext:value-type="float">
            <text:p>-0.517102615694165</text:p>
          </table:table-cell>
          <table:table-cell office:value-type="float" office:value="0.517102615694165" calcext:value-type="float">
            <text:p>0.51710261569416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-7.3</text:p>
          </table:table-cell>
          <table:table-cell office:value-type="float" office:value="7.3" calcext:value-type="float">
            <text:p>7.3</text:p>
          </table:table-cell>
          <table:table-cell office:value-type="float" office:value="-0.378238341968912" calcext:value-type="float">
            <text:p>-0.378238341968912</text:p>
          </table:table-cell>
          <table:table-cell office:value-type="float" office:value="0.378238341968912" calcext:value-type="float">
            <text:p>0.37823834196891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19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-5.62</text:p>
          </table:table-cell>
          <table:table-cell table:style-name="ce21" office:value-type="float" office:value="5.62" calcext:value-type="float">
            <text:p>5.62</text:p>
          </table:table-cell>
          <table:table-cell office:value-type="float" office:value="-0.318955732122588" calcext:value-type="float">
            <text:p>-0.318955732122588</text:p>
          </table:table-cell>
          <table:table-cell office:value-type="float" office:value="0.318955732122588" calcext:value-type="float">
            <text:p>0.3189557321225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19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-5.25</text:p>
          </table:table-cell>
          <table:table-cell table:style-name="ce21" office:value-type="float" office:value="5.25" calcext:value-type="float">
            <text:p>5.25</text:p>
          </table:table-cell>
          <table:table-cell office:value-type="float" office:value="-0.304347826086957" calcext:value-type="float">
            <text:p>-0.304347826086957</text:p>
          </table:table-cell>
          <table:table-cell office:value-type="float" office:value="0.304347826086957" calcext:value-type="float">
            <text:p>0.30434782608695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</text:p>
          </table:table-cell>
          <table:table-cell office:value-type="float" office:value="4.55" calcext:value-type="float">
            <text:p>4.55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3.38" calcext:value-type="float">
            <text:p>-3.38</text:p>
          </table:table-cell>
          <table:table-cell table:style-name="ce21" office:value-type="float" office:value="3.38" calcext:value-type="float">
            <text:p>3.38</text:p>
          </table:table-cell>
          <table:table-cell office:value-type="float" office:value="-0.219765929778934" calcext:value-type="float">
            <text:p>-0.219765929778934</text:p>
          </table:table-cell>
          <table:table-cell office:value-type="float" office:value="0.219765929778934" calcext:value-type="float">
            <text:p>0.2197659297789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18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-10.92</text:p>
          </table:table-cell>
          <table:table-cell office:value-type="float" office:value="10.92" calcext:value-type="float">
            <text:p>10.92</text:p>
          </table:table-cell>
          <table:table-cell office:value-type="float" office:value="-0.498175182481752" calcext:value-type="float">
            <text:p>-0.498175182481752</text:p>
          </table:table-cell>
          <table:table-cell office:value-type="float" office:value="0.498175182481752" calcext:value-type="float">
            <text:p>0.4981751824817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-7.86</text:p>
          </table:table-cell>
          <table:table-cell office:value-type="float" office:value="7.86" calcext:value-type="float">
            <text:p>7.86</text:p>
          </table:table-cell>
          <table:table-cell office:value-type="float" office:value="-0.416755037115589" calcext:value-type="float">
            <text:p>-0.416755037115589</text:p>
          </table:table-cell>
          <table:table-cell office:value-type="float" office:value="0.416755037115589" calcext:value-type="float">
            <text:p>0.41675503711558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-0.4136460554371" calcext:value-type="float">
            <text:p>-0.4136460554371</text:p>
          </table:table-cell>
          <table:table-cell office:value-type="float" office:value="0.4136460554371" calcext:value-type="float">
            <text:p>0.413646055437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-7.43</text:p>
          </table:table-cell>
          <table:table-cell office:value-type="float" office:value="7.43" calcext:value-type="float">
            <text:p>7.43</text:p>
          </table:table-cell>
          <table:table-cell office:value-type="float" office:value="-0.403147042864894" calcext:value-type="float">
            <text:p>-0.403147042864894</text:p>
          </table:table-cell>
          <table:table-cell office:value-type="float" office:value="0.403147042864894" calcext:value-type="float">
            <text:p>0.4031470428648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19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-6.18</text:p>
          </table:table-cell>
          <table:table-cell office:value-type="float" office:value="6.18" calcext:value-type="float">
            <text:p>6.18</text:p>
          </table:table-cell>
          <table:table-cell office:value-type="float" office:value="-0.359720605355064" calcext:value-type="float">
            <text:p>-0.359720605355064</text:p>
          </table:table-cell>
          <table:table-cell office:value-type="float" office:value="0.359720605355064" calcext:value-type="float">
            <text:p>0.35972060535506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19"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-4.95</text:p>
          </table:table-cell>
          <table:table-cell table:style-name="ce21" office:value-type="float" office:value="4.95" calcext:value-type="float">
            <text:p>4.95</text:p>
          </table:table-cell>
          <table:table-cell office:value-type="float" office:value="-0.310344827586207" calcext:value-type="float">
            <text:p>-0.310344827586207</text:p>
          </table:table-cell>
          <table:table-cell office:value-type="float" office:value="0.310344827586207" calcext:value-type="float">
            <text:p>0.3103448275862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18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-12.42</text:p>
          </table:table-cell>
          <table:table-cell office:value-type="float" office:value="12.42" calcext:value-type="float">
            <text:p>12.42</text:p>
          </table:table-cell>
          <table:table-cell office:value-type="float" office:value="-0.553969669937556" calcext:value-type="float">
            <text:p>-0.553969669937556</text:p>
          </table:table-cell>
          <table:table-cell office:value-type="float" office:value="0.553969669937556" calcext:value-type="float">
            <text:p>0.55396966993755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[17.0, 29.0]</text:p>
          </table:table-cell>
          <table:table-cell table:style-name="ce18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-12.8</text:p>
          </table:table-cell>
          <table:table-cell office:value-type="float" office:value="12.8" calcext:value-type="float">
            <text:p>12.8</text:p>
          </table:table-cell>
          <table:table-cell office:value-type="float" office:value="-0.56140350877193" calcext:value-type="float">
            <text:p>-0.56140350877193</text:p>
          </table:table-cell>
          <table:table-cell office:value-type="float" office:value="0.56140350877193" calcext:value-type="float">
            <text:p>0.5614035087719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18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8.26" calcext:value-type="float">
            <text:p>-8.26</text:p>
          </table:table-cell>
          <table:table-cell office:value-type="float" office:value="8.26" calcext:value-type="float">
            <text:p>8.26</text:p>
          </table:table-cell>
          <table:table-cell office:value-type="float" office:value="-0.452354874041621" calcext:value-type="float">
            <text:p>-0.452354874041621</text:p>
          </table:table-cell>
          <table:table-cell office:value-type="float" office:value="0.452354874041621" calcext:value-type="float">
            <text:p>0.45235487404162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5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19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-9.87</text:p>
          </table:table-cell>
          <table:table-cell office:value-type="float" office:value="9.87" calcext:value-type="float">
            <text:p>9.87</text:p>
          </table:table-cell>
          <table:table-cell office:value-type="float" office:value="-0.496728736789129" calcext:value-type="float">
            <text:p>-0.496728736789129</text:p>
          </table:table-cell>
          <table:table-cell office:value-type="float" office:value="0.496728736789129" calcext:value-type="float">
            <text:p>0.49672873678912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5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19" office:value-type="float" office:value="12.75" calcext:value-type="float">
            <text:p>12.75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8.1" calcext:value-type="float">
            <text:p>-8.1</text:p>
          </table:table-cell>
          <table:table-cell office:value-type="float" office:value="8.1" calcext:value-type="float">
            <text:p>8.1</text:p>
          </table:table-cell>
          <table:table-cell office:value-type="float" office:value="-0.447513812154696" calcext:value-type="float">
            <text:p>-0.447513812154696</text:p>
          </table:table-cell>
          <table:table-cell office:value-type="float" office:value="0.447513812154696" calcext:value-type="float">
            <text:p>0.44751381215469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-9.18</text:p>
          </table:table-cell>
          <table:table-cell office:value-type="float" office:value="9.18" calcext:value-type="float">
            <text:p>9.18</text:p>
          </table:table-cell>
          <table:table-cell office:value-type="float" office:value="-0.478623566214807" calcext:value-type="float">
            <text:p>-0.478623566214807</text:p>
          </table:table-cell>
          <table:table-cell office:value-type="float" office:value="0.478623566214807" calcext:value-type="float">
            <text:p>0.4786235662148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7.83" calcext:value-type="float">
            <text:p>-7.83</text:p>
          </table:table-cell>
          <table:table-cell office:value-type="float" office:value="7.83" calcext:value-type="float">
            <text:p>7.83</text:p>
          </table:table-cell>
          <table:table-cell office:value-type="float" office:value="-0.439147504206394" calcext:value-type="float">
            <text:p>-0.439147504206394</text:p>
          </table:table-cell>
          <table:table-cell office:value-type="float" office:value="0.439147504206394" calcext:value-type="float">
            <text:p>0.4391475042063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4.87" calcext:value-type="float">
            <text:p>-4.87</text:p>
          </table:table-cell>
          <table:table-cell table:style-name="ce21" office:value-type="float" office:value="4.87" calcext:value-type="float">
            <text:p>4.87</text:p>
          </table:table-cell>
          <table:table-cell office:value-type="float" office:value="-0.327505043712172" calcext:value-type="float">
            <text:p>-0.327505043712172</text:p>
          </table:table-cell>
          <table:table-cell office:value-type="float" office:value="0.327505043712172" calcext:value-type="float">
            <text:p>0.32750504371217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5.8" calcext:value-type="float">
            <text:p>-5.8</text:p>
          </table:table-cell>
          <table:table-cell table:style-name="ce21" office:value-type="float" office:value="5.8" calcext:value-type="float">
            <text:p>5.8</text:p>
          </table:table-cell>
          <table:table-cell office:value-type="float" office:value="-0.367088607594937" calcext:value-type="float">
            <text:p>-0.367088607594937</text:p>
          </table:table-cell>
          <table:table-cell office:value-type="float" office:value="0.367088607594937" calcext:value-type="float">
            <text:p>0.36708860759493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18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-12.66</text:p>
          </table:table-cell>
          <table:table-cell office:value-type="float" office:value="12.66" calcext:value-type="float">
            <text:p>12.66</text:p>
          </table:table-cell>
          <table:table-cell office:value-type="float" office:value="-0.584487534626039" calcext:value-type="float">
            <text:p>-0.584487534626039</text:p>
          </table:table-cell>
          <table:table-cell office:value-type="float" office:value="0.584487534626039" calcext:value-type="float">
            <text:p>0.58448753462603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18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-10.93</text:p>
          </table:table-cell>
          <table:table-cell office:value-type="float" office:value="10.93" calcext:value-type="float">
            <text:p>10.93</text:p>
          </table:table-cell>
          <table:table-cell office:value-type="float" office:value="-0.548419468138485" calcext:value-type="float">
            <text:p>-0.548419468138485</text:p>
          </table:table-cell>
          <table:table-cell office:value-type="float" office:value="0.548419468138485" calcext:value-type="float">
            <text:p>0.54841946813848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18" office:value-type="float" office:value="0.143" calcext:value-type="float">
            <text:p>0.143</text:p>
          </table:table-cell>
          <table:table-cell table:style-name="ce19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-0.550898203592814" calcext:value-type="float">
            <text:p>-0.550898203592814</text:p>
          </table:table-cell>
          <table:table-cell office:value-type="float" office:value="0.550898203592814" calcext:value-type="float">
            <text:p>0.55089820359281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9.81" calcext:value-type="float">
            <text:p>-9.81</text:p>
          </table:table-cell>
          <table:table-cell office:value-type="float" office:value="9.81" calcext:value-type="float">
            <text:p>9.81</text:p>
          </table:table-cell>
          <table:table-cell office:value-type="float" office:value="-0.521531100478469" calcext:value-type="float">
            <text:p>-0.521531100478469</text:p>
          </table:table-cell>
          <table:table-cell office:value-type="float" office:value="0.521531100478469" calcext:value-type="float">
            <text:p>0.52153110047846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-10.02</text:p>
          </table:table-cell>
          <table:table-cell office:value-type="float" office:value="10.02" calcext:value-type="float">
            <text:p>10.02</text:p>
          </table:table-cell>
          <table:table-cell office:value-type="float" office:value="-0.526813880126183" calcext:value-type="float">
            <text:p>-0.526813880126183</text:p>
          </table:table-cell>
          <table:table-cell office:value-type="float" office:value="0.526813880126183" calcext:value-type="float">
            <text:p>0.52681388012618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</text:p>
          </table:table-cell>
          <table:table-cell table:style-name="ce19" office:value-type="float" office:value="20.46" calcext:value-type="float">
            <text:p>20.46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8.7" calcext:value-type="float">
            <text:p>-8.7</text:p>
          </table:table-cell>
          <table:table-cell office:value-type="float" office:value="8.7" calcext:value-type="float">
            <text:p>8.7</text:p>
          </table:table-cell>
          <table:table-cell office:value-type="float" office:value="-0.491525423728814" calcext:value-type="float">
            <text:p>-0.491525423728814</text:p>
          </table:table-cell>
          <table:table-cell office:value-type="float" office:value="0.491525423728814" calcext:value-type="float">
            <text:p>0.49152542372881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7.05" calcext:value-type="float">
            <text:p>-7.05</text:p>
          </table:table-cell>
          <table:table-cell office:value-type="float" office:value="7.05" calcext:value-type="float">
            <text:p>7.05</text:p>
          </table:table-cell>
          <table:table-cell office:value-type="float" office:value="-0.439252336448598" calcext:value-type="float">
            <text:p>-0.439252336448598</text:p>
          </table:table-cell>
          <table:table-cell office:value-type="float" office:value="0.439252336448598" calcext:value-type="float">
            <text:p>0.43925233644859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-8.12</text:p>
          </table:table-cell>
          <table:table-cell office:value-type="float" office:value="8.12" calcext:value-type="float">
            <text:p>8.12</text:p>
          </table:table-cell>
          <table:table-cell office:value-type="float" office:value="-0.474299065420561" calcext:value-type="float">
            <text:p>-0.474299065420561</text:p>
          </table:table-cell>
          <table:table-cell office:value-type="float" office:value="0.474299065420561" calcext:value-type="float">
            <text:p>0.47429906542056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7.56" calcext:value-type="float">
            <text:p>-7.56</text:p>
          </table:table-cell>
          <table:table-cell office:value-type="float" office:value="7.56" calcext:value-type="float">
            <text:p>7.56</text:p>
          </table:table-cell>
          <table:table-cell office:value-type="float" office:value="-0.456521739130435" calcext:value-type="float">
            <text:p>-0.456521739130435</text:p>
          </table:table-cell>
          <table:table-cell office:value-type="float" office:value="0.456521739130435" calcext:value-type="float">
            <text:p>0.45652173913043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-0.461722488038278" calcext:value-type="float">
            <text:p>-0.461722488038278</text:p>
          </table:table-cell>
          <table:table-cell office:value-type="float" office:value="0.461722488038278" calcext:value-type="float">
            <text:p>0.46172248803827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19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-6.1</text:p>
          </table:table-cell>
          <table:table-cell office:value-type="float" office:value="6.1" calcext:value-type="float">
            <text:p>6.1</text:p>
          </table:table-cell>
          <table:table-cell office:value-type="float" office:value="-0.403973509933775" calcext:value-type="float">
            <text:p>-0.403973509933775</text:p>
          </table:table-cell>
          <table:table-cell office:value-type="float" office:value="0.403973509933775" calcext:value-type="float">
            <text:p>0.40397350993377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19" office:value-type="float" office:value="13.43" calcext:value-type="float">
            <text:p>13.43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4.48" calcext:value-type="float">
            <text:p>-4.48</text:p>
          </table:table-cell>
          <table:table-cell table:style-name="ce21" office:value-type="float" office:value="4.48" calcext:value-type="float">
            <text:p>4.48</text:p>
          </table:table-cell>
          <table:table-cell office:value-type="float" office:value="-0.332344213649852" calcext:value-type="float">
            <text:p>-0.332344213649852</text:p>
          </table:table-cell>
          <table:table-cell office:value-type="float" office:value="0.332344213649852" calcext:value-type="float">
            <text:p>0.3323442136498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19" office:value-type="float" office:value="11.49" calcext:value-type="float">
            <text:p>11.49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10.83" calcext:value-type="float">
            <text:p>-10.83</text:p>
          </table:table-cell>
          <table:table-cell office:value-type="float" office:value="10.83" calcext:value-type="float">
            <text:p>10.83</text:p>
          </table:table-cell>
          <table:table-cell office:value-type="float" office:value="-0.575146043547531" calcext:value-type="float">
            <text:p>-0.575146043547531</text:p>
          </table:table-cell>
          <table:table-cell office:value-type="float" office:value="0.575146043547531" calcext:value-type="float">
            <text:p>0.57514604354753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18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-12.31</text:p>
          </table:table-cell>
          <table:table-cell office:value-type="float" office:value="12.31" calcext:value-type="float">
            <text:p>12.31</text:p>
          </table:table-cell>
          <table:table-cell office:value-type="float" office:value="-0.606105366814377" calcext:value-type="float">
            <text:p>-0.606105366814377</text:p>
          </table:table-cell>
          <table:table-cell office:value-type="float" office:value="0.606105366814377" calcext:value-type="float">
            <text:p>0.60610536681437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18" office:value-type="float" office:value="0.144" calcext:value-type="float">
            <text:p>0.1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-11.16</text:p>
          </table:table-cell>
          <table:table-cell office:value-type="float" office:value="11.16" calcext:value-type="float">
            <text:p>11.16</text:p>
          </table:table-cell>
          <table:table-cell office:value-type="float" office:value="-0.582463465553236" calcext:value-type="float">
            <text:p>-0.582463465553236</text:p>
          </table:table-cell>
          <table:table-cell office:value-type="float" office:value="0.582463465553236" calcext:value-type="float">
            <text:p>0.5824634655532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-11.29</text:p>
          </table:table-cell>
          <table:table-cell office:value-type="float" office:value="11.29" calcext:value-type="float">
            <text:p>11.29</text:p>
          </table:table-cell>
          <table:table-cell office:value-type="float" office:value="-0.585277345775013" calcext:value-type="float">
            <text:p>-0.585277345775013</text:p>
          </table:table-cell>
          <table:table-cell office:value-type="float" office:value="0.585277345775013" calcext:value-type="float">
            <text:p>0.58527734577501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19" office:value-type="float" office:value="20.91" calcext:value-type="float">
            <text:p>20.91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9.81" calcext:value-type="float">
            <text:p>-9.81</text:p>
          </table:table-cell>
          <table:table-cell office:value-type="float" office:value="9.81" calcext:value-type="float">
            <text:p>9.81</text:p>
          </table:table-cell>
          <table:table-cell office:value-type="float" office:value="-0.550814149354295" calcext:value-type="float">
            <text:p>-0.550814149354295</text:p>
          </table:table-cell>
          <table:table-cell office:value-type="float" office:value="0.550814149354295" calcext:value-type="float">
            <text:p>0.55081414935429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19" office:value-type="float" office:value="19.51" calcext:value-type="float">
            <text:p>19.51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9.54" calcext:value-type="float">
            <text:p>-9.54</text:p>
          </table:table-cell>
          <table:table-cell office:value-type="float" office:value="9.54" calcext:value-type="float">
            <text:p>9.54</text:p>
          </table:table-cell>
          <table:table-cell office:value-type="float" office:value="-0.543899657924743" calcext:value-type="float">
            <text:p>-0.543899657924743</text:p>
          </table:table-cell>
          <table:table-cell office:value-type="float" office:value="0.543899657924743" calcext:value-type="float">
            <text:p>0.54389965792474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19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-10.22</text:p>
          </table:table-cell>
          <table:table-cell office:value-type="float" office:value="10.22" calcext:value-type="float">
            <text:p>10.22</text:p>
          </table:table-cell>
          <table:table-cell office:value-type="float" office:value="-0.560922063666301" calcext:value-type="float">
            <text:p>-0.560922063666301</text:p>
          </table:table-cell>
          <table:table-cell office:value-type="float" office:value="0.560922063666301" calcext:value-type="float">
            <text:p>0.56092206366630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19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-9.31</text:p>
          </table:table-cell>
          <table:table-cell office:value-type="float" office:value="9.31" calcext:value-type="float">
            <text:p>9.31</text:p>
          </table:table-cell>
          <table:table-cell office:value-type="float" office:value="-0.537839399191219" calcext:value-type="float">
            <text:p>-0.537839399191219</text:p>
          </table:table-cell>
          <table:table-cell office:value-type="float" office:value="0.537839399191219" calcext:value-type="float">
            <text:p>0.53783939919121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19" office:value-type="float" office:value="12.8" calcext:value-type="float">
            <text:p>12.8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8.73" calcext:value-type="float">
            <text:p>-8.73</text:p>
          </table:table-cell>
          <table:table-cell office:value-type="float" office:value="8.73" calcext:value-type="float">
            <text:p>8.73</text:p>
          </table:table-cell>
          <table:table-cell office:value-type="float" office:value="-0.521817095038852" calcext:value-type="float">
            <text:p>-0.521817095038852</text:p>
          </table:table-cell>
          <table:table-cell office:value-type="float" office:value="0.521817095038852" calcext:value-type="float">
            <text:p>0.5218170950388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-8.93" calcext:value-type="float">
            <text:p>-8.93</text:p>
          </table:table-cell>
          <table:table-cell office:value-type="float" office:value="8.93" calcext:value-type="float">
            <text:p>8.93</text:p>
          </table:table-cell>
          <table:table-cell office:value-type="float" office:value="-0.527466036621382" calcext:value-type="float">
            <text:p>-0.527466036621382</text:p>
          </table:table-cell>
          <table:table-cell office:value-type="float" office:value="0.527466036621382" calcext:value-type="float">
            <text:p>0.52746603662138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-6.14" calcext:value-type="float">
            <text:p>-6.14</text:p>
          </table:table-cell>
          <table:table-cell office:value-type="float" office:value="6.14" calcext:value-type="float">
            <text:p>6.14</text:p>
          </table:table-cell>
          <table:table-cell office:value-type="float" office:value="-0.434229137199434" calcext:value-type="float">
            <text:p>-0.434229137199434</text:p>
          </table:table-cell>
          <table:table-cell office:value-type="float" office:value="0.434229137199434" calcext:value-type="float">
            <text:p>0.4342291371994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19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-6.19</text:p>
          </table:table-cell>
          <table:table-cell office:value-type="float" office:value="6.19" calcext:value-type="float">
            <text:p>6.19</text:p>
          </table:table-cell>
          <table:table-cell office:value-type="float" office:value="-0.436222692036646" calcext:value-type="float">
            <text:p>-0.436222692036646</text:p>
          </table:table-cell>
          <table:table-cell office:value-type="float" office:value="0.436222692036646" calcext:value-type="float">
            <text:p>0.436222692036646</text:p>
          </table:table-cell>
          <table:table-cell office:value-type="string" calcext:value-type="string">
            <text:p>reliable</text:p>
          </table:table-cell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3:21:11.02169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2T13:21:42.056282000</dc:date>
    <meta:editing-duration>PT17M45S</meta:editing-duration>
    <meta:editing-cycles>7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