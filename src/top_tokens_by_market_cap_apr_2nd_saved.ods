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236in"/>
    </style:style>
    <style:style style:name="co2" style:family="table-column">
      <style:table-column-properties fo:break-before="auto" style:column-width="1.0661in"/>
    </style:style>
    <style:style style:name="co3" style:family="table-column">
      <style:table-column-properties fo:break-before="auto" style:column-width="2.3008in"/>
    </style:style>
    <style:style style:name="co4" style:family="table-column">
      <style:table-column-properties fo:break-before="auto" style:column-width="1.1516in"/>
    </style:style>
    <style:style style:name="co5" style:family="table-column">
      <style:table-column-properties fo:break-before="auto" style:column-width="1.55in"/>
    </style:style>
    <style:style style:name="co6" style:family="table-column">
      <style:table-column-properties fo:break-before="auto" style:column-width="1.788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6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Code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Fira Code"/>
    </style:style>
    <style:style style:name="ce8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in"/>
      <style:text-properties style:font-name="Fira Code"/>
    </style:style>
    <style:style style:name="ce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  <style:text-properties style:font-name="Fira Code"/>
    </style:style>
    <style:style style:name="ce4" style:family="table-cell" style:parent-style-name="Default" style:data-style-name="N4">
      <style:table-cell-properties style:vertical-align="middle"/>
      <style:text-properties style:font-name="Fira Code"/>
    </style:style>
    <style:style style:name="ce5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style:font-name="Fira Code"/>
    </style:style>
    <style:style style:name="ce6" style:family="table-cell" style:parent-style-name="Default" style:data-style-name="N3">
      <style:table-cell-properties style:vertical-align="middle"/>
      <style:text-properties style:font-name="Fira Code"/>
    </style:style>
  </office:automatic-styles>
  <office:body>
    <office:spreadsheet>
      <table:calculation-settings table:automatic-find-labels="false" table:use-regular-expressions="false" table:use-wildcards="true"/>
      <table:table table:name="top_tokens_by_market_cap_apr_2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column table:style-name="co7" table:number-columns-repeated="16378"/>
        <table:table-row table:style-name="ro1">
          <table:table-cell office:value-type="string" calcext:value-type="string">
            <text:p>ranking#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id</text:p>
          </table:table-cell>
          <table:table-cell table:style-name="ce3" office:value-type="string" calcext:value-type="string">
            <text:p>price</text:p>
          </table:table-cell>
          <table:table-cell table:style-name="ce5" office:value-type="string" calcext:value-type="string">
            <text:p>24h_volume</text:p>
          </table:table-cell>
          <table:table-cell table:style-name="ce5" office:value-type="string" calcext:value-type="string">
            <text:p>market_cap</text:p>
          </table:table-cell>
          <table:table-cell table:style-name="ce1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c</text:p>
          </table:table-cell>
          <table:table-cell table:style-name="ce2" office:value-type="string" calcext:value-type="string">
            <text:p>bitcoin</text:p>
          </table:table-cell>
          <table:table-cell office:value-type="float" office:value="66921" calcext:value-type="float">
            <text:p>66,921.00</text:p>
          </table:table-cell>
          <table:table-cell office:value-type="float" office:value="50825867762" calcext:value-type="float">
            <text:p>50,825,867,762</text:p>
          </table:table-cell>
          <table:table-cell office:value-type="float" office:value="1339076753423" calcext:value-type="float">
            <text:p>1,339,076,753,4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th</text:p>
          </table:table-cell>
          <table:table-cell table:style-name="ce2" office:value-type="string" calcext:value-type="string">
            <text:p>ethereum</text:p>
          </table:table-cell>
          <table:table-cell office:value-type="float" office:value="2084.64" calcext:value-type="float">
            <text:p>2,084.64</text:p>
          </table:table-cell>
          <table:table-cell office:value-type="float" office:value="21579839518" calcext:value-type="float">
            <text:p>21,579,839,518</text:p>
          </table:table-cell>
          <table:table-cell office:value-type="float" office:value="251436082082" calcext:value-type="float">
            <text:p>251,436,082,0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tether</text:p>
          </table:table-cell>
          <table:table-cell office:value-type="float" office:value="0.999875" calcext:value-type="float">
            <text:p>1.00</text:p>
          </table:table-cell>
          <table:table-cell office:value-type="float" office:value="80917242893" calcext:value-type="float">
            <text:p>80,917,242,893</text:p>
          </table:table-cell>
          <table:table-cell office:value-type="float" office:value="184136689025" calcext:value-type="float">
            <text:p>184,136,689,0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nb</text:p>
          </table:table-cell>
          <table:table-cell table:style-name="ce2" office:value-type="string" calcext:value-type="string">
            <text:p>binancecoin</text:p>
          </table:table-cell>
          <table:table-cell office:value-type="float" office:value="599.99" calcext:value-type="float">
            <text:p>599.99</text:p>
          </table:table-cell>
          <table:table-cell office:value-type="float" office:value="1166519831" calcext:value-type="float">
            <text:p>1,166,519,831</text:p>
          </table:table-cell>
          <table:table-cell office:value-type="float" office:value="81809060646" calcext:value-type="float">
            <text:p>81,809,060,6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rp</text:p>
          </table:table-cell>
          <table:table-cell office:value-type="string" calcext:value-type="string">
            <text:p>ripple</text:p>
          </table:table-cell>
          <table:table-cell office:value-type="float" office:value="1.32" calcext:value-type="float">
            <text:p>1.32</text:p>
          </table:table-cell>
          <table:table-cell office:value-type="float" office:value="2087483503" calcext:value-type="float">
            <text:p>2,087,483,503</text:p>
          </table:table-cell>
          <table:table-cell office:value-type="float" office:value="81071888724" calcext:value-type="float">
            <text:p>81,071,888,7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dc</text:p>
          </table:table-cell>
          <table:table-cell office:value-type="string" calcext:value-type="string">
            <text:p>usd-coin</text:p>
          </table:table-cell>
          <table:table-cell office:value-type="float" office:value="0.999809" calcext:value-type="float">
            <text:p>1.00</text:p>
          </table:table-cell>
          <table:table-cell office:value-type="float" office:value="14609201982" calcext:value-type="float">
            <text:p>14,609,201,982</text:p>
          </table:table-cell>
          <table:table-cell office:value-type="float" office:value="77196940366" calcext:value-type="float">
            <text:p>77,196,940,3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l</text:p>
          </table:table-cell>
          <table:table-cell table:style-name="ce2" office:value-type="string" calcext:value-type="string">
            <text:p>solana</text:p>
          </table:table-cell>
          <table:table-cell office:value-type="float" office:value="78.7" calcext:value-type="float">
            <text:p>78.70</text:p>
          </table:table-cell>
          <table:table-cell office:value-type="float" office:value="5236090361" calcext:value-type="float">
            <text:p>5,236,090,361</text:p>
          </table:table-cell>
          <table:table-cell office:value-type="float" office:value="45068244278" calcext:value-type="float">
            <text:p>45,068,244,2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x</text:p>
          </table:table-cell>
          <table:table-cell office:value-type="string" calcext:value-type="string">
            <text:p>tron</text:p>
          </table:table-cell>
          <table:table-cell office:value-type="float" office:value="0.315456" calcext:value-type="float">
            <text:p>0.32</text:p>
          </table:table-cell>
          <table:table-cell office:value-type="float" office:value="642259193" calcext:value-type="float">
            <text:p>642,259,193</text:p>
          </table:table-cell>
          <table:table-cell office:value-type="float" office:value="29885043631" calcext:value-type="float">
            <text:p>29,885,043,6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gr_heloc</text:p>
          </table:table-cell>
          <table:table-cell office:value-type="string" calcext:value-type="string">
            <text:p>figure-heloc</text:p>
          </table:table-cell>
          <table:table-cell office:value-type="float" office:value="1.025" calcext:value-type="float">
            <text:p>1.03</text:p>
          </table:table-cell>
          <table:table-cell office:value-type="float" office:value="14731672" calcext:value-type="float">
            <text:p>14,731,672</text:p>
          </table:table-cell>
          <table:table-cell office:value-type="float" office:value="16708052865" calcext:value-type="float">
            <text:p>16,708,052,8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ge</text:p>
          </table:table-cell>
          <table:table-cell table:style-name="ce2" office:value-type="string" calcext:value-type="string">
            <text:p>dogecoin</text:p>
          </table:table-cell>
          <table:table-cell office:value-type="float" office:value="0.090098" calcext:value-type="float">
            <text:p>0.09</text:p>
          </table:table-cell>
          <table:table-cell office:value-type="float" office:value="1164592343" calcext:value-type="float">
            <text:p>1,164,592,343</text:p>
          </table:table-cell>
          <table:table-cell office:value-type="float" office:value="13836868998" calcext:value-type="float">
            <text:p>13,836,868,9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usds</text:p>
          </table:table-cell>
          <table:table-cell office:value-type="float" office:value="0.999933" calcext:value-type="float">
            <text:p>1.00</text:p>
          </table:table-cell>
          <table:table-cell office:value-type="float" office:value="175580502" calcext:value-type="float">
            <text:p>175,580,502</text:p>
          </table:table-cell>
          <table:table-cell office:value-type="float" office:value="11735007161" calcext:value-type="float">
            <text:p>11,735,007,1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bt</text:p>
          </table:table-cell>
          <table:table-cell office:value-type="string" calcext:value-type="string">
            <text:p>whitebit</text:p>
          </table:table-cell>
          <table:table-cell office:value-type="float" office:value="51.48" calcext:value-type="float">
            <text:p>51.48</text:p>
          </table:table-cell>
          <table:table-cell office:value-type="float" office:value="79787508" calcext:value-type="float">
            <text:p>79,787,508</text:p>
          </table:table-cell>
          <table:table-cell office:value-type="float" office:value="10984486308" calcext:value-type="float">
            <text:p>10,984,486,3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eo-token</text:p>
          </table:table-cell>
          <table:table-cell office:value-type="float" office:value="10.03" calcext:value-type="float">
            <text:p>10.03</text:p>
          </table:table-cell>
          <table:table-cell office:value-type="float" office:value="372845" calcext:value-type="float">
            <text:p>372,845</text:p>
          </table:table-cell>
          <table:table-cell office:value-type="float" office:value="9233245929" calcext:value-type="float">
            <text:p>9,233,245,9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ch</text:p>
          </table:table-cell>
          <table:table-cell office:value-type="string" calcext:value-type="string">
            <text:p>bitcoin-cash</text:p>
          </table:table-cell>
          <table:table-cell office:value-type="float" office:value="450.02" calcext:value-type="float">
            <text:p>450.02</text:p>
          </table:table-cell>
          <table:table-cell office:value-type="float" office:value="258071194" calcext:value-type="float">
            <text:p>258,071,194</text:p>
          </table:table-cell>
          <table:table-cell office:value-type="float" office:value="9008024681" calcext:value-type="float">
            <text:p>9,008,024,6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cardano</text:p>
          </table:table-cell>
          <table:table-cell office:value-type="float" office:value="0.240283" calcext:value-type="float">
            <text:p>0.24</text:p>
          </table:table-cell>
          <table:table-cell office:value-type="float" office:value="567340872" calcext:value-type="float">
            <text:p>567,340,872</text:p>
          </table:table-cell>
          <table:table-cell office:value-type="float" office:value="8859936194" calcext:value-type="float">
            <text:p>8,859,936,1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ype</text:p>
          </table:table-cell>
          <table:table-cell office:value-type="string" calcext:value-type="string">
            <text:p>hyperliquid</text:p>
          </table:table-cell>
          <table:table-cell office:value-type="float" office:value="35.36" calcext:value-type="float">
            <text:p>35.36</text:p>
          </table:table-cell>
          <table:table-cell office:value-type="float" office:value="259528830" calcext:value-type="float">
            <text:p>259,528,830</text:p>
          </table:table-cell>
          <table:table-cell office:value-type="float" office:value="8408716111" calcext:value-type="float">
            <text:p>8,408,716,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mr</text:p>
          </table:table-cell>
          <table:table-cell table:style-name="ce2" office:value-type="string" calcext:value-type="string">
            <text:p>monero</text:p>
          </table:table-cell>
          <table:table-cell office:value-type="float" office:value="334.35" calcext:value-type="float">
            <text:p>334.35</text:p>
          </table:table-cell>
          <table:table-cell office:value-type="float" office:value="92994019" calcext:value-type="float">
            <text:p>92,994,019</text:p>
          </table:table-cell>
          <table:table-cell office:value-type="float" office:value="6163267949" calcext:value-type="float">
            <text:p>6,163,267,9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hainlink</text:p>
          </table:table-cell>
          <table:table-cell office:value-type="float" office:value="8.65" calcext:value-type="float">
            <text:p>8.65</text:p>
          </table:table-cell>
          <table:table-cell office:value-type="float" office:value="391639441" calcext:value-type="float">
            <text:p>391,639,441</text:p>
          </table:table-cell>
          <table:table-cell office:value-type="float" office:value="6128169120" calcext:value-type="float">
            <text:p>6,128,169,1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sde</text:p>
          </table:table-cell>
          <table:table-cell office:value-type="string" calcext:value-type="string">
            <text:p>ethena-usde</text:p>
          </table:table-cell>
          <table:table-cell office:value-type="float" office:value="0.9996" calcext:value-type="float">
            <text:p>1.00</text:p>
          </table:table-cell>
          <table:table-cell office:value-type="float" office:value="148351778" calcext:value-type="float">
            <text:p>148,351,778</text:p>
          </table:table-cell>
          <table:table-cell office:value-type="float" office:value="5880709718" calcext:value-type="float">
            <text:p>5,880,709,7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stellar</text:p>
          </table:table-cell>
          <table:table-cell office:value-type="float" office:value="0.164966" calcext:value-type="float">
            <text:p>0.16</text:p>
          </table:table-cell>
          <table:table-cell office:value-type="float" office:value="106601468" calcext:value-type="float">
            <text:p>106,601,468</text:p>
          </table:table-cell>
          <table:table-cell office:value-type="float" office:value="5456303765" calcext:value-type="float">
            <text:p>5,456,303,7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anton-network</text:p>
          </table:table-cell>
          <table:table-cell office:value-type="float" office:value="0.141683" calcext:value-type="float">
            <text:p>0.14</text:p>
          </table:table-cell>
          <table:table-cell office:value-type="float" office:value="8537651" calcext:value-type="float">
            <text:p>8,537,651</text:p>
          </table:table-cell>
          <table:table-cell office:value-type="float" office:value="5418352787" calcext:value-type="float">
            <text:p>5,418,352,7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dai</text:p>
          </table:table-cell>
          <table:table-cell office:value-type="float" office:value="0.99997" calcext:value-type="float">
            <text:p>1.00</text:p>
          </table:table-cell>
          <table:table-cell office:value-type="float" office:value="178548264" calcext:value-type="float">
            <text:p>178,548,264</text:p>
          </table:table-cell>
          <table:table-cell office:value-type="float" office:value="4426820821" calcext:value-type="float">
            <text:p>4,426,820,8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sd1</text:p>
          </table:table-cell>
          <table:table-cell office:value-type="string" calcext:value-type="string">
            <text:p>usd1-wlfi</text:p>
          </table:table-cell>
          <table:table-cell office:value-type="float" office:value="0.999762" calcext:value-type="float">
            <text:p>1.00</text:p>
          </table:table-cell>
          <table:table-cell office:value-type="float" office:value="1242609518" calcext:value-type="float">
            <text:p>1,242,609,518</text:p>
          </table:table-cell>
          <table:table-cell office:value-type="float" office:value="4398674922" calcext:value-type="float">
            <text:p>4,398,674,9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mecore</text:p>
          </table:table-cell>
          <table:table-cell office:value-type="float" office:value="2.49" calcext:value-type="float">
            <text:p>2.49</text:p>
          </table:table-cell>
          <table:table-cell office:value-type="float" office:value="11312029" calcext:value-type="float">
            <text:p>11,312,029</text:p>
          </table:table-cell>
          <table:table-cell office:value-type="float" office:value="4359723154" calcext:value-type="float">
            <text:p>4,359,723,1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c</text:p>
          </table:table-cell>
          <table:table-cell table:style-name="ce2" office:value-type="string" calcext:value-type="string">
            <text:p>litecoin</text:p>
          </table:table-cell>
          <table:table-cell office:value-type="float" office:value="52.75" calcext:value-type="float">
            <text:p>52.75</text:p>
          </table:table-cell>
          <table:table-cell office:value-type="float" office:value="388291125" calcext:value-type="float">
            <text:p>388,291,125</text:p>
          </table:table-cell>
          <table:table-cell office:value-type="float" office:value="4061991414" calcext:value-type="float">
            <text:p>4,061,991,4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zec</text:p>
          </table:table-cell>
          <table:table-cell table:style-name="ce2" office:value-type="string" calcext:value-type="string">
            <text:p>zcash</text:p>
          </table:table-cell>
          <table:table-cell office:value-type="float" office:value="242.93" calcext:value-type="float">
            <text:p>242.93</text:p>
          </table:table-cell>
          <table:table-cell office:value-type="float" office:value="373043655" calcext:value-type="float">
            <text:p>373,043,655</text:p>
          </table:table-cell>
          <table:table-cell office:value-type="float" office:value="4042964689" calcext:value-type="float">
            <text:p>4,042,964,6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yusd</text:p>
          </table:table-cell>
          <table:table-cell office:value-type="string" calcext:value-type="string">
            <text:p>paypal-usd</text:p>
          </table:table-cell>
          <table:table-cell office:value-type="float" office:value="1" calcext:value-type="float">
            <text:p>1.00</text:p>
          </table:table-cell>
          <table:table-cell office:value-type="float" office:value="347182568" calcext:value-type="float">
            <text:p>347,182,568</text:p>
          </table:table-cell>
          <table:table-cell office:value-type="float" office:value="4004376445" calcext:value-type="float">
            <text:p>4,004,376,4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vax</text:p>
          </table:table-cell>
          <table:table-cell office:value-type="string" calcext:value-type="string">
            <text:p>avalanche-2</text:p>
          </table:table-cell>
          <table:table-cell office:value-type="float" office:value="8.83" calcext:value-type="float">
            <text:p>8.83</text:p>
          </table:table-cell>
          <table:table-cell office:value-type="float" office:value="339541773" calcext:value-type="float">
            <text:p>339,541,773</text:p>
          </table:table-cell>
          <table:table-cell office:value-type="float" office:value="3814474752" calcext:value-type="float">
            <text:p>3,814,474,7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bar</text:p>
          </table:table-cell>
          <table:table-cell office:value-type="string" calcext:value-type="string">
            <text:p>hedera-hashgraph</text:p>
          </table:table-cell>
          <table:table-cell office:value-type="float" office:value="0.086571" calcext:value-type="float">
            <text:p>0.09</text:p>
          </table:table-cell>
          <table:table-cell office:value-type="float" office:value="84004744" calcext:value-type="float">
            <text:p>84,004,744</text:p>
          </table:table-cell>
          <table:table-cell office:value-type="float" office:value="3750128657" calcext:value-type="float">
            <text:p>3,750,128,6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rain</text:p>
          </table:table-cell>
          <table:table-cell office:value-type="float" office:value="0.00761414" calcext:value-type="float">
            <text:p>0.01</text:p>
          </table:table-cell>
          <table:table-cell office:value-type="float" office:value="34836694" calcext:value-type="float">
            <text:p>34,836,694</text:p>
          </table:table-cell>
          <table:table-cell office:value-type="float" office:value="3639877423" calcext:value-type="float">
            <text:p>3,639,877,4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hib</text:p>
          </table:table-cell>
          <table:table-cell office:value-type="string" calcext:value-type="string">
            <text:p>shiba-inu</text:p>
          </table:table-cell>
          <table:table-cell office:value-type="float" office:value="0.00000585" calcext:value-type="float">
            <text:p>0.00</text:p>
          </table:table-cell>
          <table:table-cell office:value-type="float" office:value="117674335" calcext:value-type="float">
            <text:p>117,674,335</text:p>
          </table:table-cell>
          <table:table-cell office:value-type="float" office:value="3446894211" calcext:value-type="float">
            <text:p>3,446,894,2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sui</text:p>
          </table:table-cell>
          <table:table-cell office:value-type="float" office:value="0.861608" calcext:value-type="float">
            <text:p>0.86</text:p>
          </table:table-cell>
          <table:table-cell office:value-type="float" office:value="372259705" calcext:value-type="float">
            <text:p>372,259,705</text:p>
          </table:table-cell>
          <table:table-cell office:value-type="float" office:value="3406076578" calcext:value-type="float">
            <text:p>3,406,076,5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he-open-network</text:p>
          </table:table-cell>
          <table:table-cell office:value-type="float" office:value="1.21" calcext:value-type="float">
            <text:p>1.21</text:p>
          </table:table-cell>
          <table:table-cell office:value-type="float" office:value="78108298" calcext:value-type="float">
            <text:p>78,108,298</text:p>
          </table:table-cell>
          <table:table-cell office:value-type="float" office:value="3000958511" calcext:value-type="float">
            <text:p>3,000,958,5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ao</text:p>
          </table:table-cell>
          <table:table-cell office:value-type="string" calcext:value-type="string">
            <text:p>bittensor</text:p>
          </table:table-cell>
          <table:table-cell office:value-type="float" office:value="307.45" calcext:value-type="float">
            <text:p>307.45</text:p>
          </table:table-cell>
          <table:table-cell office:value-type="float" office:value="468716103" calcext:value-type="float">
            <text:p>468,716,103</text:p>
          </table:table-cell>
          <table:table-cell office:value-type="float" office:value="2947884080" calcext:value-type="float">
            <text:p>2,947,884,0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crypto-com-chain</text:p>
          </table:table-cell>
          <table:table-cell office:value-type="float" office:value="0.069524" calcext:value-type="float">
            <text:p>0.07</text:p>
          </table:table-cell>
          <table:table-cell office:value-type="float" office:value="10704703" calcext:value-type="float">
            <text:p>10,704,703</text:p>
          </table:table-cell>
          <table:table-cell office:value-type="float" office:value="2941300413" calcext:value-type="float">
            <text:p>2,941,300,4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lfi</text:p>
          </table:table-cell>
          <table:table-cell office:value-type="string" calcext:value-type="string">
            <text:p>world-liberty-financial</text:p>
          </table:table-cell>
          <table:table-cell office:value-type="float" office:value="0.098046" calcext:value-type="float">
            <text:p>0.10</text:p>
          </table:table-cell>
          <table:table-cell office:value-type="float" office:value="44573280" calcext:value-type="float">
            <text:p>44,573,280</text:p>
          </table:table-cell>
          <table:table-cell office:value-type="float" office:value="2825210479" calcext:value-type="float">
            <text:p>2,825,210,4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syc</text:p>
          </table:table-cell>
          <table:table-cell office:value-type="string" calcext:value-type="string">
            <text:p>hashnote-usyc</text:p>
          </table:table-cell>
          <table:table-cell office:value-type="float" office:value="1.12" calcext:value-type="float">
            <text:p>1.12</text:p>
          </table:table-cell>
          <table:table-cell office:value-type="float" office:value="112109" calcext:value-type="float">
            <text:p>112,109</text:p>
          </table:table-cell>
          <table:table-cell office:value-type="float" office:value="2705841851" calcext:value-type="float">
            <text:p>2,705,841,8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xaut</text:p>
          </table:table-cell>
          <table:table-cell office:value-type="string" calcext:value-type="string">
            <text:p>tether-gold</text:p>
          </table:table-cell>
          <table:table-cell office:value-type="float" office:value="4662.45" calcext:value-type="float">
            <text:p>4,662.45</text:p>
          </table:table-cell>
          <table:table-cell office:value-type="float" office:value="536066342" calcext:value-type="float">
            <text:p>536,066,342</text:p>
          </table:table-cell>
          <table:table-cell office:value-type="float" office:value="2610105616" calcext:value-type="float">
            <text:p>2,610,105,6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xg</text:p>
          </table:table-cell>
          <table:table-cell office:value-type="string" calcext:value-type="string">
            <text:p>pax-gold</text:p>
          </table:table-cell>
          <table:table-cell office:value-type="float" office:value="4681.14" calcext:value-type="float">
            <text:p>4,681.14</text:p>
          </table:table-cell>
          <table:table-cell office:value-type="float" office:value="420940029" calcext:value-type="float">
            <text:p>420,940,029</text:p>
          </table:table-cell>
          <table:table-cell office:value-type="float" office:value="2407477891" calcext:value-type="float">
            <text:p>2,407,477,8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uidl</text:p>
          </table:table-cell>
          <table:table-cell office:value-type="string" calcext:value-type="string">
            <text:p>blackrock-usd-institutional-digital-liquidity-fund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office:value-type="float" office:value="2247006894" calcext:value-type="float">
            <text:p>2,247,006,8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mantle</text:p>
          </table:table-cell>
          <table:table-cell office:value-type="float" office:value="0.682876" calcext:value-type="float">
            <text:p>0.68</text:p>
          </table:table-cell>
          <table:table-cell office:value-type="float" office:value="45370160" calcext:value-type="float">
            <text:p>45,370,160</text:p>
          </table:table-cell>
          <table:table-cell office:value-type="float" office:value="2240062715" calcext:value-type="float">
            <text:p>2,240,062,7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uniswap</text:p>
          </table:table-cell>
          <table:table-cell office:value-type="float" office:value="3.47" calcext:value-type="float">
            <text:p>3.47</text:p>
          </table:table-cell>
          <table:table-cell office:value-type="float" office:value="165301194" calcext:value-type="float">
            <text:p>165,301,194</text:p>
          </table:table-cell>
          <table:table-cell office:value-type="float" office:value="2200397119" calcext:value-type="float">
            <text:p>2,200,397,1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polkadot</text:p>
          </table:table-cell>
          <table:table-cell office:value-type="float" office:value="1.22" calcext:value-type="float">
            <text:p>1.22</text:p>
          </table:table-cell>
          <table:table-cell office:value-type="float" office:value="119460623" calcext:value-type="float">
            <text:p>119,460,623</text:p>
          </table:table-cell>
          <table:table-cell office:value-type="float" office:value="2049989328" calcext:value-type="float">
            <text:p>2,049,989,3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sdg</text:p>
          </table:table-cell>
          <table:table-cell office:value-type="string" calcext:value-type="string">
            <text:p>global-dollar</text:p>
          </table:table-cell>
          <table:table-cell office:value-type="float" office:value="0.999763" calcext:value-type="float">
            <text:p>1.00</text:p>
          </table:table-cell>
          <table:table-cell office:value-type="float" office:value="81615790" calcext:value-type="float">
            <text:p>81,615,790</text:p>
          </table:table-cell>
          <table:table-cell office:value-type="float" office:value="1842200478" calcext:value-type="float">
            <text:p>1,842,200,4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-network</text:p>
          </table:table-cell>
          <table:table-cell office:value-type="float" office:value="0.1759" calcext:value-type="float">
            <text:p>0.18</text:p>
          </table:table-cell>
          <table:table-cell office:value-type="float" office:value="18558604" calcext:value-type="float">
            <text:p>18,558,604</text:p>
          </table:table-cell>
          <table:table-cell office:value-type="float" office:value="1762037666" calcext:value-type="float">
            <text:p>1,762,037,6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sdf</text:p>
          </table:table-cell>
          <table:table-cell office:value-type="string" calcext:value-type="string">
            <text:p>falcon-finance</text:p>
          </table:table-cell>
          <table:table-cell office:value-type="float" office:value="0.998505" calcext:value-type="float">
            <text:p>1.00</text:p>
          </table:table-cell>
          <table:table-cell office:value-type="float" office:value="1082984" calcext:value-type="float">
            <text:p>1,082,984</text:p>
          </table:table-cell>
          <table:table-cell office:value-type="float" office:value="1746054425" calcext:value-type="float">
            <text:p>1,746,054,4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okb</text:p>
          </table:table-cell>
          <table:table-cell office:value-type="float" office:value="83.11" calcext:value-type="float">
            <text:p>83.11</text:p>
          </table:table-cell>
          <table:table-cell office:value-type="float" office:value="17511409" calcext:value-type="float">
            <text:p>17,511,409</text:p>
          </table:table-cell>
          <table:table-cell office:value-type="float" office:value="1745397281" calcext:value-type="float">
            <text:p>1,745,397,28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sky</text:p>
          </table:table-cell>
          <table:table-cell office:value-type="float" office:value="0.07376" calcext:value-type="float">
            <text:p>0.07</text:p>
          </table:table-cell>
          <table:table-cell office:value-type="float" office:value="20319532" calcext:value-type="float">
            <text:p>20,319,532</text:p>
          </table:table-cell>
          <table:table-cell office:value-type="float" office:value="1706043762" calcext:value-type="float">
            <text:p>1,706,043,7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ster</text:p>
          </table:table-cell>
          <table:table-cell office:value-type="string" calcext:value-type="string">
            <text:p>aster-2</text:p>
          </table:table-cell>
          <table:table-cell office:value-type="float" office:value="0.658283" calcext:value-type="float">
            <text:p>0.66</text:p>
          </table:table-cell>
          <table:table-cell office:value-type="float" office:value="86102494" calcext:value-type="float">
            <text:p>86,102,494</text:p>
          </table:table-cell>
          <table:table-cell office:value-type="float" office:value="1617717866" calcext:value-type="float">
            <text:p>1,617,717,8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x</text:p>
          </table:table-cell>
          <table:table-cell office:value-type="string" calcext:value-type="string">
            <text:p>htx-dao</text:p>
          </table:table-cell>
          <table:table-cell office:value-type="float" office:value="0.00000172" calcext:value-type="float">
            <text:p>0.00</text:p>
          </table:table-cell>
          <table:table-cell office:value-type="float" office:value="15270471" calcext:value-type="float">
            <text:p>15,270,471</text:p>
          </table:table-cell>
          <table:table-cell office:value-type="float" office:value="1575430361" calcext:value-type="float">
            <text:p>1,575,430,3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ear</text:p>
          </table:table-cell>
          <table:table-cell table:style-name="ce2" office:value-type="string" calcext:value-type="string">
            <text:p>near</text:p>
          </table:table-cell>
          <table:table-cell office:value-type="float" office:value="1.16" calcext:value-type="float">
            <text:p>1.16</text:p>
          </table:table-cell>
          <table:table-cell office:value-type="float" office:value="181469904" calcext:value-type="float">
            <text:p>181,469,904</text:p>
          </table:table-cell>
          <table:table-cell office:value-type="float" office:value="1503172933" calcext:value-type="float">
            <text:p>1,503,172,9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aave</text:p>
          </table:table-cell>
          <table:table-cell office:value-type="float" office:value="94.95" calcext:value-type="float">
            <text:p>94.95</text:p>
          </table:table-cell>
          <table:table-cell office:value-type="float" office:value="228425140" calcext:value-type="float">
            <text:p>228,425,140</text:p>
          </table:table-cell>
          <table:table-cell office:value-type="float" office:value="1442126110" calcext:value-type="float">
            <text:p>1,442,126,1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pe</text:p>
          </table:table-cell>
          <table:table-cell table:style-name="ce2" office:value-type="string" calcext:value-type="string">
            <text:p>pepe</text:p>
          </table:table-cell>
          <table:table-cell office:value-type="float" office:value="0.00000331" calcext:value-type="float">
            <text:p>0.00</text:p>
          </table:table-cell>
          <table:table-cell office:value-type="float" office:value="297163106" calcext:value-type="float">
            <text:p>297,163,106</text:p>
          </table:table-cell>
          <table:table-cell office:value-type="float" office:value="1392318429" calcext:value-type="float">
            <text:p>1,392,318,4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gb</text:p>
          </table:table-cell>
          <table:table-cell office:value-type="string" calcext:value-type="string">
            <text:p>bitget-token</text:p>
          </table:table-cell>
          <table:table-cell office:value-type="float" office:value="1.94" calcext:value-type="float">
            <text:p>1.94</text:p>
          </table:table-cell>
          <table:table-cell office:value-type="float" office:value="26075756" calcext:value-type="float">
            <text:p>26,075,756</text:p>
          </table:table-cell>
          <table:table-cell office:value-type="float" office:value="1358506258" calcext:value-type="float">
            <text:p>1,358,506,2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dy</text:p>
          </table:table-cell>
          <table:table-cell office:value-type="string" calcext:value-type="string">
            <text:p>ondo-us-dollar-yield</text:p>
          </table:table-cell>
          <table:table-cell office:value-type="float" office:value="1.13" calcext:value-type="float">
            <text:p>1.13</text:p>
          </table:table-cell>
          <table:table-cell office:value-type="float" office:value="1283315" calcext:value-type="float">
            <text:p>1,283,315</text:p>
          </table:table-cell>
          <table:table-cell office:value-type="float" office:value="1327002719" calcext:value-type="float">
            <text:p>1,327,002,7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bfusd</text:p>
          </table:table-cell>
          <table:table-cell office:value-type="float" office:value="0.999455" calcext:value-type="float">
            <text:p>1.00</text:p>
          </table:table-cell>
          <table:table-cell office:value-type="float" office:value="1437557" calcext:value-type="float">
            <text:p>1,437,557</text:p>
          </table:table-cell>
          <table:table-cell office:value-type="float" office:value="1319280477" calcext:value-type="float">
            <text:p>1,319,280,4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lusd</text:p>
          </table:table-cell>
          <table:table-cell office:value-type="string" calcext:value-type="string">
            <text:p>ripple-usd</text:p>
          </table:table-cell>
          <table:table-cell office:value-type="float" office:value="0.999828" calcext:value-type="float">
            <text:p>1.00</text:p>
          </table:table-cell>
          <table:table-cell office:value-type="float" office:value="123673169" calcext:value-type="float">
            <text:p>123,673,169</text:p>
          </table:table-cell>
          <table:table-cell office:value-type="float" office:value="1308283515" calcext:value-type="float">
            <text:p>1,308,283,5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ndo</text:p>
          </table:table-cell>
          <table:table-cell office:value-type="string" calcext:value-type="string">
            <text:p>ondo-finance</text:p>
          </table:table-cell>
          <table:table-cell office:value-type="float" office:value="0.26137" calcext:value-type="float">
            <text:p>0.26</text:p>
          </table:table-cell>
          <table:table-cell office:value-type="float" office:value="70433712" calcext:value-type="float">
            <text:p>70,433,712</text:p>
          </table:table-cell>
          <table:table-cell office:value-type="float" office:value="1272692643" calcext:value-type="float">
            <text:p>1,272,692,6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tc</text:p>
          </table:table-cell>
          <table:table-cell table:style-name="ce2" office:value-type="string" calcext:value-type="string">
            <text:p>ethereum-classic</text:p>
          </table:table-cell>
          <table:table-cell office:value-type="float" office:value="7.97" calcext:value-type="float">
            <text:p>7.97</text:p>
          </table:table-cell>
          <table:table-cell office:value-type="float" office:value="36271359" calcext:value-type="float">
            <text:p>36,271,359</text:p>
          </table:table-cell>
          <table:table-cell office:value-type="float" office:value="1244566214" calcext:value-type="float">
            <text:p>1,244,566,2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nternet-computer</text:p>
          </table:table-cell>
          <table:table-cell office:value-type="float" office:value="2.23" calcext:value-type="float">
            <text:p>2.23</text:p>
          </table:table-cell>
          <table:table-cell office:value-type="float" office:value="39469955" calcext:value-type="float">
            <text:p>39,469,955</text:p>
          </table:table-cell>
          <table:table-cell office:value-type="float" office:value="1226511083" calcext:value-type="float">
            <text:p>1,226,511,0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trsy</text:p>
          </table:table-cell>
          <table:table-cell office:value-type="string" calcext:value-type="string">
            <text:p>janus-henderson-anemoy-treasury-fund</text:p>
          </table:table-cell>
          <table:table-cell office:value-type="float" office:value="1.099" calcext:value-type="float">
            <text:p>1.10</text:p>
          </table:table-cell>
          <table:table-cell office:value-type="float" office:value="0" calcext:value-type="float">
            <text:p>0</text:p>
          </table:table-cell>
          <table:table-cell office:value-type="float" office:value="1190827239" calcext:value-type="float">
            <text:p>1,190,827,2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atechain-token</text:p>
          </table:table-cell>
          <table:table-cell office:value-type="float" office:value="6.54" calcext:value-type="float">
            <text:p>6.54</text:p>
          </table:table-cell>
          <table:table-cell office:value-type="float" office:value="2534541" calcext:value-type="float">
            <text:p>2,534,541</text:p>
          </table:table-cell>
          <table:table-cell office:value-type="float" office:value="1133103428" calcext:value-type="float">
            <text:p>1,133,103,4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usdd</text:p>
          </table:table-cell>
          <table:table-cell office:value-type="float" office:value="0.999611" calcext:value-type="float">
            <text:p>1.00</text:p>
          </table:table-cell>
          <table:table-cell office:value-type="float" office:value="3900787" calcext:value-type="float">
            <text:p>3,900,787</text:p>
          </table:table-cell>
          <table:table-cell office:value-type="float" office:value="1122453331" calcext:value-type="float">
            <text:p>1,122,453,3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cs</text:p>
          </table:table-cell>
          <table:table-cell office:value-type="string" calcext:value-type="string">
            <text:p>kucoin-shares</text:p>
          </table:table-cell>
          <table:table-cell office:value-type="float" office:value="7.91" calcext:value-type="float">
            <text:p>7.91</text:p>
          </table:table-cell>
          <table:table-cell office:value-type="float" office:value="11258149" calcext:value-type="float">
            <text:p>11,258,149</text:p>
          </table:table-cell>
          <table:table-cell office:value-type="float" office:value="1065750253" calcext:value-type="float">
            <text:p>1,065,750,2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qnt</text:p>
          </table:table-cell>
          <table:table-cell office:value-type="string" calcext:value-type="string">
            <text:p>quant-network</text:p>
          </table:table-cell>
          <table:table-cell office:value-type="float" office:value="69.81" calcext:value-type="float">
            <text:p>69.81</text:p>
          </table:table-cell>
          <table:table-cell office:value-type="float" office:value="11125527" calcext:value-type="float">
            <text:p>11,125,527</text:p>
          </table:table-cell>
          <table:table-cell office:value-type="float" office:value="1015595442" calcext:value-type="float">
            <text:p>1,015,595,4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ump</text:p>
          </table:table-cell>
          <table:table-cell table:style-name="ce2" office:value-type="string" calcext:value-type="string">
            <text:p>pump-fun</text:p>
          </table:table-cell>
          <table:table-cell office:value-type="float" office:value="0.00162667" calcext:value-type="float">
            <text:p>0.00</text:p>
          </table:table-cell>
          <table:table-cell office:value-type="float" office:value="77552189" calcext:value-type="float">
            <text:p>77,552,189</text:p>
          </table:table-cell>
          <table:table-cell office:value-type="float" office:value="958453509" calcext:value-type="float">
            <text:p>958,453,5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lygon-ecosystem-token</text:p>
          </table:table-cell>
          <table:table-cell office:value-type="float" office:value="0.090304" calcext:value-type="float">
            <text:p>0.09</text:p>
          </table:table-cell>
          <table:table-cell office:value-type="float" office:value="64643005" calcext:value-type="float">
            <text:p>64,643,005</text:p>
          </table:table-cell>
          <table:table-cell office:value-type="float" office:value="958953407" calcext:value-type="float">
            <text:p>958,953,4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eutbl</text:p>
          </table:table-cell>
          <table:table-cell office:value-type="float" office:value="1.21" calcext:value-type="float">
            <text:p>1.21</text:p>
          </table:table-cell>
          <table:table-cell office:value-type="float" office:value="0" calcext:value-type="float">
            <text:p>0</text:p>
          </table:table-cell>
          <table:table-cell office:value-type="float" office:value="920876236" calcext:value-type="float">
            <text:p>920,876,2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lgorand</text:p>
          </table:table-cell>
          <table:table-cell office:value-type="float" office:value="0.101563" calcext:value-type="float">
            <text:p>0.10</text:p>
          </table:table-cell>
          <table:table-cell office:value-type="float" office:value="159633601" calcext:value-type="float">
            <text:p>159,633,601</text:p>
          </table:table-cell>
          <table:table-cell office:value-type="float" office:value="900984631" calcext:value-type="float">
            <text:p>900,984,6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nder</text:p>
          </table:table-cell>
          <table:table-cell office:value-type="string" calcext:value-type="string">
            <text:p>render-token</text:p>
          </table:table-cell>
          <table:table-cell office:value-type="float" office:value="1.72" calcext:value-type="float">
            <text:p>1.72</text:p>
          </table:table-cell>
          <table:table-cell office:value-type="float" office:value="68156683" calcext:value-type="float">
            <text:p>68,156,683</text:p>
          </table:table-cell>
          <table:table-cell office:value-type="float" office:value="894129756" calcext:value-type="float">
            <text:p>894,129,75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worldcoin-wld</text:p>
          </table:table-cell>
          <table:table-cell office:value-type="float" office:value="0.267755" calcext:value-type="float">
            <text:p>0.27</text:p>
          </table:table-cell>
          <table:table-cell office:value-type="float" office:value="77553236" calcext:value-type="float">
            <text:p>77,553,236</text:p>
          </table:table-cell>
          <table:table-cell office:value-type="float" office:value="867849665" calcext:value-type="float">
            <text:p>867,849,6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usdtb</text:p>
          </table:table-cell>
          <table:table-cell office:value-type="float" office:value="0.99916" calcext:value-type="float">
            <text:p>1.00</text:p>
          </table:table-cell>
          <table:table-cell office:value-type="float" office:value="3640599" calcext:value-type="float">
            <text:p>3,640,599</text:p>
          </table:table-cell>
          <table:table-cell office:value-type="float" office:value="862577619" calcext:value-type="float">
            <text:p>862,577,6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kas</text:p>
          </table:table-cell>
          <table:table-cell office:value-type="string" calcext:value-type="string">
            <text:p>kaspa</text:p>
          </table:table-cell>
          <table:table-cell office:value-type="float" office:value="0.03133568" calcext:value-type="float">
            <text:p>0.03</text:p>
          </table:table-cell>
          <table:table-cell office:value-type="float" office:value="37074458" calcext:value-type="float">
            <text:p>37,074,458</text:p>
          </table:table-cell>
          <table:table-cell office:value-type="float" office:value="856292305" calcext:value-type="float">
            <text:p>856,292,3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nexo</text:p>
          </table:table-cell>
          <table:table-cell office:value-type="float" office:value="0.856312" calcext:value-type="float">
            <text:p>0.86</text:p>
          </table:table-cell>
          <table:table-cell office:value-type="float" office:value="6603042" calcext:value-type="float">
            <text:p>6,603,042</text:p>
          </table:table-cell>
          <table:table-cell office:value-type="float" office:value="855958319" calcext:value-type="float">
            <text:p>855,958,3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morpho</text:p>
          </table:table-cell>
          <table:table-cell office:value-type="float" office:value="1.52" calcext:value-type="float">
            <text:p>1.52</text:p>
          </table:table-cell>
          <table:table-cell office:value-type="float" office:value="22200859" calcext:value-type="float">
            <text:p>22,200,859</text:p>
          </table:table-cell>
          <table:table-cell office:value-type="float" office:value="835956655" calcext:value-type="float">
            <text:p>835,956,6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cosmos</text:p>
          </table:table-cell>
          <table:table-cell office:value-type="float" office:value="1.64" calcext:value-type="float">
            <text:p>1.64</text:p>
          </table:table-cell>
          <table:table-cell office:value-type="float" office:value="42945806" calcext:value-type="float">
            <text:p>42,945,806</text:p>
          </table:table-cell>
          <table:table-cell office:value-type="float" office:value="823797726" calcext:value-type="float">
            <text:p>823,797,7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ustb</text:p>
          </table:table-cell>
          <table:table-cell office:value-type="string" calcext:value-type="string">
            <text:p>superstate-short-duration-us-government-securities-fund-ustb</text:p>
          </table:table-cell>
          <table:table-cell office:value-type="float" office:value="11.04" calcext:value-type="float">
            <text:p>11.04</text:p>
          </table:table-cell>
          <table:table-cell office:value-type="float" office:value="0" calcext:value-type="float">
            <text:p>0</text:p>
          </table:table-cell>
          <table:table-cell office:value-type="float" office:value="818763625" calcext:value-type="float">
            <text:p>818,763,6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midnight-3</text:p>
          </table:table-cell>
          <table:table-cell office:value-type="float" office:value="0.04874103" calcext:value-type="float">
            <text:p>0.05</text:p>
          </table:table-cell>
          <table:table-cell office:value-type="float" office:value="207434918" calcext:value-type="float">
            <text:p>207,434,918</text:p>
          </table:table-cell>
          <table:table-cell office:value-type="float" office:value="809497968" calcext:value-type="float">
            <text:p>809,497,9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thena</text:p>
          </table:table-cell>
          <table:table-cell office:value-type="float" office:value="0.085644" calcext:value-type="float">
            <text:p>0.09</text:p>
          </table:table-cell>
          <table:table-cell office:value-type="float" office:value="111911255" calcext:value-type="float">
            <text:p>111,911,255</text:p>
          </table:table-cell>
          <table:table-cell office:value-type="float" office:value="728339868" calcext:value-type="float">
            <text:p>728,339,8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aptos</text:p>
          </table:table-cell>
          <table:table-cell office:value-type="float" office:value="0.866054" calcext:value-type="float">
            <text:p>0.87</text:p>
          </table:table-cell>
          <table:table-cell office:value-type="float" office:value="67073008" calcext:value-type="float">
            <text:p>67,073,008</text:p>
          </table:table-cell>
          <table:table-cell office:value-type="float" office:value="687761766" calcext:value-type="float">
            <text:p>687,761,76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official-trump</text:p>
          </table:table-cell>
          <table:table-cell office:value-type="float" office:value="2.89" calcext:value-type="float">
            <text:p>2.89</text:p>
          </table:table-cell>
          <table:table-cell office:value-type="float" office:value="103599321" calcext:value-type="float">
            <text:p>103,599,321</text:p>
          </table:table-cell>
          <table:table-cell office:value-type="float" office:value="672104073" calcext:value-type="float">
            <text:p>672,104,07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lr</text:p>
          </table:table-cell>
          <table:table-cell office:value-type="string" calcext:value-type="string">
            <text:p>flare-networks</text:p>
          </table:table-cell>
          <table:table-cell office:value-type="float" office:value="0.00752475" calcext:value-type="float">
            <text:p>0.01</text:p>
          </table:table-cell>
          <table:table-cell office:value-type="float" office:value="5751511" calcext:value-type="float">
            <text:p>5,751,511</text:p>
          </table:table-cell>
          <table:table-cell office:value-type="float" office:value="643513373" calcext:value-type="float">
            <text:p>643,513,3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filecoin</text:p>
          </table:table-cell>
          <table:table-cell office:value-type="float" office:value="0.814018" calcext:value-type="float">
            <text:p>0.81</text:p>
          </table:table-cell>
          <table:table-cell office:value-type="float" office:value="70763101" calcext:value-type="float">
            <text:p>70,763,101</text:p>
          </table:table-cell>
          <table:table-cell office:value-type="float" office:value="624121405" calcext:value-type="float">
            <text:p>624,121,4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dx</text:p>
          </table:table-cell>
          <table:table-cell office:value-type="string" calcext:value-type="string">
            <text:p>beldex</text:p>
          </table:table-cell>
          <table:table-cell office:value-type="float" office:value="0.079116" calcext:value-type="float">
            <text:p>0.08</text:p>
          </table:table-cell>
          <table:table-cell office:value-type="float" office:value="11422051" calcext:value-type="float">
            <text:p>11,422,051</text:p>
          </table:table-cell>
          <table:table-cell office:value-type="float" office:value="612382134" calcext:value-type="float">
            <text:p>612,382,1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ousg</text:p>
          </table:table-cell>
          <table:table-cell office:value-type="float" office:value="114.78" calcext:value-type="float">
            <text:p>114.78</text:p>
          </table:table-cell>
          <table:table-cell office:value-type="float" office:value="0" calcext:value-type="float">
            <text:p>0</text:p>
          </table:table-cell>
          <table:table-cell office:value-type="float" office:value="602646411" calcext:value-type="float">
            <text:p>602,646,4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ylds</text:p>
          </table:table-cell>
          <table:table-cell office:value-type="float" office:value="0.999821" calcext:value-type="float">
            <text:p>1.00</text:p>
          </table:table-cell>
          <table:table-cell office:value-type="float" office:value="5038846" calcext:value-type="float">
            <text:p>5,038,846</text:p>
          </table:table-cell>
          <table:table-cell office:value-type="float" office:value="599695132" calcext:value-type="float">
            <text:p>599,695,1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xdc</text:p>
          </table:table-cell>
          <table:table-cell office:value-type="string" calcext:value-type="string">
            <text:p>xdce-crowd-sale</text:p>
          </table:table-cell>
          <table:table-cell office:value-type="float" office:value="0.02979194" calcext:value-type="float">
            <text:p>0.03</text:p>
          </table:table-cell>
          <table:table-cell office:value-type="float" office:value="24246320" calcext:value-type="float">
            <text:p>24,246,320</text:p>
          </table:table-cell>
          <table:table-cell office:value-type="float" office:value="594056955" calcext:value-type="float">
            <text:p>594,056,9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hash-2</text:p>
          </table:table-cell>
          <table:table-cell office:value-type="float" office:value="0.01040877" calcext:value-type="float">
            <text:p>0.01</text:p>
          </table:table-cell>
          <table:table-cell office:value-type="float" office:value="17966.46" calcext:value-type="float">
            <text:p>17,966</text:p>
          </table:table-cell>
          <table:table-cell office:value-type="float" office:value="586661827" calcext:value-type="float">
            <text:p>586,661,8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gho</text:p>
          </table:table-cell>
          <table:table-cell office:value-type="float" office:value="0.999405" calcext:value-type="float">
            <text:p>1.00</text:p>
          </table:table-cell>
          <table:table-cell office:value-type="float" office:value="7474635" calcext:value-type="float">
            <text:p>7,474,635</text:p>
          </table:table-cell>
          <table:table-cell office:value-type="float" office:value="583641362" calcext:value-type="float">
            <text:p>583,641,3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vechain</text:p>
          </table:table-cell>
          <table:table-cell office:value-type="float" office:value="0.00676512" calcext:value-type="float">
            <text:p>0.01</text:p>
          </table:table-cell>
          <table:table-cell office:value-type="float" office:value="14663823" calcext:value-type="float">
            <text:p>14,663,823</text:p>
          </table:table-cell>
          <table:table-cell office:value-type="float" office:value="581324384" calcext:value-type="float">
            <text:p>581,324,3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stable-2</text:p>
          </table:table-cell>
          <table:table-cell office:value-type="float" office:value="0.02706167" calcext:value-type="float">
            <text:p>0.03</text:p>
          </table:table-cell>
          <table:table-cell office:value-type="float" office:value="41706064" calcext:value-type="float">
            <text:p>41,706,064</text:p>
          </table:table-cell>
          <table:table-cell office:value-type="float" office:value="580498168" calcext:value-type="float">
            <text:p>580,498,1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sd0</text:p>
          </table:table-cell>
          <table:table-cell office:value-type="string" calcext:value-type="string">
            <text:p>usual-usd</text:p>
          </table:table-cell>
          <table:table-cell office:value-type="float" office:value="0.99579" calcext:value-type="float">
            <text:p>1.00</text:p>
          </table:table-cell>
          <table:table-cell office:value-type="float" office:value="1270622" calcext:value-type="float">
            <text:p>1,270,622</text:p>
          </table:table-cell>
          <table:table-cell office:value-type="float" office:value="559762899" calcext:value-type="float">
            <text:p>559,762,8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ust</text:p>
          </table:table-cell>
          <table:table-cell office:value-type="float" office:value="0.063297" calcext:value-type="float">
            <text:p>0.06</text:p>
          </table:table-cell>
          <table:table-cell office:value-type="float" office:value="33578796" calcext:value-type="float">
            <text:p>33,578,796</text:p>
          </table:table-cell>
          <table:table-cell office:value-type="float" office:value="558181642" calcext:value-type="float">
            <text:p>558,181,64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arbitrum</text:p>
          </table:table-cell>
          <table:table-cell office:value-type="float" office:value="0.091547" calcext:value-type="float">
            <text:p>0.09</text:p>
          </table:table-cell>
          <table:table-cell office:value-type="float" office:value="60419254" calcext:value-type="float">
            <text:p>60,419,254</text:p>
          </table:table-cell>
          <table:table-cell office:value-type="float" office:value="553087103" calcext:value-type="float">
            <text:p>553,087,1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up</text:p>
          </table:table-cell>
          <table:table-cell table:style-name="ce2" office:value-type="string" calcext:value-type="string">
            <text:p>jupiter-exchange-solana</text:p>
          </table:table-cell>
          <table:table-cell office:value-type="float" office:value="0.153009" calcext:value-type="float">
            <text:p>0.15</text:p>
          </table:table-cell>
          <table:table-cell office:value-type="float" office:value="42113937" calcext:value-type="float">
            <text:p>42,113,937</text:p>
          </table:table-cell>
          <table:table-cell office:value-type="float" office:value="543616580" calcext:value-type="float">
            <text:p>543,616,58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etch-ai</text:p>
          </table:table-cell>
          <table:table-cell office:value-type="float" office:value="0.229863" calcext:value-type="float">
            <text:p>0.23</text:p>
          </table:table-cell>
          <table:table-cell office:value-type="float" office:value="113924140" calcext:value-type="float">
            <text:p>113,924,140</text:p>
          </table:table-cell>
          <table:table-cell office:value-type="float" office:value="519406038" calcext:value-type="float">
            <text:p>519,406,03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onk</text:p>
          </table:table-cell>
          <table:table-cell table:style-name="ce2" office:value-type="string" calcext:value-type="string">
            <text:p>bonk</text:p>
          </table:table-cell>
          <table:table-cell office:value-type="float" office:value="0.00000572" calcext:value-type="float">
            <text:p>0.00</text:p>
          </table:table-cell>
          <table:table-cell office:value-type="float" office:value="42448344" calcext:value-type="float">
            <text:p>42,448,344</text:p>
          </table:table-cell>
          <table:table-cell office:value-type="float" office:value="502910958" calcext:value-type="float">
            <text:p>502,910,9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usd</text:p>
          </table:table-cell>
          <table:table-cell office:value-type="string" calcext:value-type="string">
            <text:p>true-usd</text:p>
          </table:table-cell>
          <table:table-cell office:value-type="float" office:value="0.997865" calcext:value-type="float">
            <text:p>1.00</text:p>
          </table:table-cell>
          <table:table-cell office:value-type="float" office:value="10201041" calcext:value-type="float">
            <text:p>10,201,041</text:p>
          </table:table-cell>
          <table:table-cell office:value-type="float" office:value="493429321" calcext:value-type="float">
            <text:p>493,429,3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zro</text:p>
          </table:table-cell>
          <table:table-cell office:value-type="string" calcext:value-type="string">
            <text:p>layerzero</text:p>
          </table:table-cell>
          <table:table-cell office:value-type="float" office:value="1.91" calcext:value-type="float">
            <text:p>1.91</text:p>
          </table:table-cell>
          <table:table-cell office:value-type="float" office:value="50362078" calcext:value-type="float">
            <text:p>50,362,078</text:p>
          </table:table-cell>
          <table:table-cell office:value-type="float" office:value="482116338" calcext:value-type="float">
            <text:p>482,116,3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a7a5</text:p>
          </table:table-cell>
          <table:table-cell office:value-type="float" office:value="0.01219918" calcext:value-type="float">
            <text:p>0.01</text:p>
          </table:table-cell>
          <table:table-cell office:value-type="float" office:value="6647.68" calcext:value-type="float">
            <text:p>6,648</text:p>
          </table:table-cell>
          <table:table-cell office:value-type="float" office:value="478204924" calcext:value-type="float">
            <text:p>478,204,9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ke</text:p>
          </table:table-cell>
          <table:table-cell table:style-name="ce2" office:value-type="string" calcext:value-type="string">
            <text:p>pancakeswap-token</text:p>
          </table:table-cell>
          <table:table-cell office:value-type="float" office:value="1.37" calcext:value-type="float">
            <text:p>1.37</text:p>
          </table:table-cell>
          <table:table-cell office:value-type="float" office:value="26072591" calcext:value-type="float">
            <text:p>26,072,591</text:p>
          </table:table-cell>
          <table:table-cell office:value-type="float" office:value="467551842" calcext:value-type="float">
            <text:p>467,551,84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virtual-protocol</text:p>
          </table:table-cell>
          <table:table-cell office:value-type="float" office:value="0.639942" calcext:value-type="float">
            <text:p>0.64</text:p>
          </table:table-cell>
          <table:table-cell office:value-type="float" office:value="60475811" calcext:value-type="float">
            <text:p>60,475,811</text:p>
          </table:table-cell>
          <table:table-cell office:value-type="float" office:value="419909758" calcext:value-type="float">
            <text:p>419,909,75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hz</text:p>
          </table:table-cell>
          <table:table-cell office:value-type="string" calcext:value-type="string">
            <text:p>chiliz</text:p>
          </table:table-cell>
          <table:table-cell office:value-type="float" office:value="0.04052628" calcext:value-type="float">
            <text:p>0.04</text:p>
          </table:table-cell>
          <table:table-cell office:value-type="float" office:value="48801776" calcext:value-type="float">
            <text:p>48,801,776</text:p>
          </table:table-cell>
          <table:table-cell office:value-type="float" office:value="417296186" calcext:value-type="float">
            <text:p>417,296,1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urc</text:p>
          </table:table-cell>
          <table:table-cell office:value-type="string" calcext:value-type="string">
            <text:p>euro-coin</text:p>
          </table:table-cell>
          <table:table-cell office:value-type="float" office:value="1.15" calcext:value-type="float">
            <text:p>1.15</text:p>
          </table:table-cell>
          <table:table-cell office:value-type="float" office:value="44666017" calcext:value-type="float">
            <text:p>44,666,017</text:p>
          </table:table-cell>
          <table:table-cell office:value-type="float" office:value="413246789" calcext:value-type="float">
            <text:p>413,246,78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blockstack</text:p>
          </table:table-cell>
          <table:table-cell office:value-type="float" office:value="0.218047" calcext:value-type="float">
            <text:p>0.22</text:p>
          </table:table-cell>
          <table:table-cell office:value-type="float" office:value="10265153" calcext:value-type="float">
            <text:p>10,265,153</text:p>
          </table:table-cell>
          <table:table-cell office:value-type="float" office:value="400866992" calcext:value-type="float">
            <text:p>400,866,99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aaa</text:p>
          </table:table-cell>
          <table:table-cell office:value-type="string" calcext:value-type="string">
            <text:p>janus-henderson-anemoy-aaa-clo-fund</text:p>
          </table:table-cell>
          <table:table-cell office:value-type="float" office:value="1.028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396372422" calcext:value-type="float">
            <text:p>396,372,42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engu</text:p>
          </table:table-cell>
          <table:table-cell table:style-name="ce2" office:value-type="string" calcext:value-type="string">
            <text:p>pudgy-penguins</text:p>
          </table:table-cell>
          <table:table-cell office:value-type="float" office:value="0.00629933" calcext:value-type="float">
            <text:p>0.01</text:p>
          </table:table-cell>
          <table:table-cell office:value-type="float" office:value="86617266" calcext:value-type="float">
            <text:p>86,617,266</text:p>
          </table:table-cell>
          <table:table-cell office:value-type="float" office:value="396029339" calcext:value-type="float">
            <text:p>396,029,33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fdusd</text:p>
          </table:table-cell>
          <table:table-cell office:value-type="string" calcext:value-type="string">
            <text:p>first-digital-usd</text:p>
          </table:table-cell>
          <table:table-cell office:value-type="float" office:value="1" calcext:value-type="float">
            <text:p>1.00</text:p>
          </table:table-cell>
          <table:table-cell office:value-type="float" office:value="58224592" calcext:value-type="float">
            <text:p>58,224,592</text:p>
          </table:table-cell>
          <table:table-cell office:value-type="float" office:value="393863459" calcext:value-type="float">
            <text:p>393,863,45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dash</text:p>
          </table:table-cell>
          <table:table-cell office:value-type="float" office:value="30.62" calcext:value-type="float">
            <text:p>30.62</text:p>
          </table:table-cell>
          <table:table-cell office:value-type="float" office:value="54648810" calcext:value-type="float">
            <text:p>54,648,810</text:p>
          </table:table-cell>
          <table:table-cell office:value-type="float" office:value="387409726" calcext:value-type="float">
            <text:p>387,409,7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dexe</text:p>
          </table:table-cell>
          <table:table-cell office:value-type="float" office:value="8.04" calcext:value-type="float">
            <text:p>8.04</text:p>
          </table:table-cell>
          <table:table-cell office:value-type="float" office:value="13957903" calcext:value-type="float">
            <text:p>13,957,903</text:p>
          </table:table-cell>
          <table:table-cell office:value-type="float" office:value="375922714" calcext:value-type="float">
            <text:p>375,922,7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hastra-prime</text:p>
          </table:table-cell>
          <table:table-cell office:value-type="float" office:value="1.027" calcext:value-type="float">
            <text:p>1.03</text:p>
          </table:table-cell>
          <table:table-cell office:value-type="float" office:value="6870199" calcext:value-type="float">
            <text:p>6,870,199</text:p>
          </table:table-cell>
          <table:table-cell office:value-type="float" office:value="375475494" calcext:value-type="float">
            <text:p>375,475,49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xtz</text:p>
          </table:table-cell>
          <table:table-cell office:value-type="string" calcext:value-type="string">
            <text:p>tezos</text:p>
          </table:table-cell>
          <table:table-cell office:value-type="float" office:value="0.343775" calcext:value-type="float">
            <text:p>0.34</text:p>
          </table:table-cell>
          <table:table-cell office:value-type="float" office:value="11653325" calcext:value-type="float">
            <text:p>11,653,325</text:p>
          </table:table-cell>
          <table:table-cell office:value-type="float" office:value="371487572" calcext:value-type="float">
            <text:p>371,487,5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kau</text:p>
          </table:table-cell>
          <table:table-cell office:value-type="string" calcext:value-type="string">
            <text:p>kinesis-gold</text:p>
          </table:table-cell>
          <table:table-cell office:value-type="float" office:value="150.63" calcext:value-type="float">
            <text:p>150.63</text:p>
          </table:table-cell>
          <table:table-cell office:value-type="float" office:value="1752088" calcext:value-type="float">
            <text:p>1,752,088</text:p>
          </table:table-cell>
          <table:table-cell office:value-type="float" office:value="359437240" calcext:value-type="float">
            <text:p>359,437,24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usx</text:p>
          </table:table-cell>
          <table:table-cell office:value-type="float" office:value="0.999474" calcext:value-type="float">
            <text:p>1.00</text:p>
          </table:table-cell>
          <table:table-cell office:value-type="float" office:value="3163397" calcext:value-type="float">
            <text:p>3,163,397</text:p>
          </table:table-cell>
          <table:table-cell office:value-type="float" office:value="358651483" calcext:value-type="float">
            <text:p>358,651,48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thfi</text:p>
          </table:table-cell>
          <table:table-cell office:value-type="string" calcext:value-type="string">
            <text:p>ether-fi</text:p>
          </table:table-cell>
          <table:table-cell office:value-type="float" office:value="0.453657" calcext:value-type="float">
            <text:p>0.45</text:p>
          </table:table-cell>
          <table:table-cell office:value-type="float" office:value="32728805" calcext:value-type="float">
            <text:p>32,728,805</text:p>
          </table:table-cell>
          <table:table-cell office:value-type="float" office:value="357328987" calcext:value-type="float">
            <text:p>357,328,98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ei-network</text:p>
          </table:table-cell>
          <table:table-cell office:value-type="float" office:value="0.05254" calcext:value-type="float">
            <text:p>0.05</text:p>
          </table:table-cell>
          <table:table-cell office:value-type="float" office:value="123098888" calcext:value-type="float">
            <text:p>123,098,888</text:p>
          </table:table-cell>
          <table:table-cell office:value-type="float" office:value="353783041" calcext:value-type="float">
            <text:p>353,783,04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cr</text:p>
          </table:table-cell>
          <table:table-cell office:value-type="string" calcext:value-type="string">
            <text:p>decred</text:p>
          </table:table-cell>
          <table:table-cell office:value-type="float" office:value="20.24" calcext:value-type="float">
            <text:p>20.24</text:p>
          </table:table-cell>
          <table:table-cell office:value-type="float" office:value="1437267" calcext:value-type="float">
            <text:p>1,437,267</text:p>
          </table:table-cell>
          <table:table-cell office:value-type="float" office:value="351299381" calcext:value-type="float">
            <text:p>351,299,38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n-token</text:p>
          </table:table-cell>
          <table:table-cell office:value-type="float" office:value="0.01831302" calcext:value-type="float">
            <text:p>0.02</text:p>
          </table:table-cell>
          <table:table-cell office:value-type="float" office:value="269763472" calcext:value-type="float">
            <text:p>269,763,472</text:p>
          </table:table-cell>
          <table:table-cell office:value-type="float" office:value="351808311" calcext:value-type="float">
            <text:p>351,808,31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adi-token</text:p>
          </table:table-cell>
          <table:table-cell office:value-type="float" office:value="4.29" calcext:value-type="float">
            <text:p>4.29</text:p>
          </table:table-cell>
          <table:table-cell office:value-type="float" office:value="646138" calcext:value-type="float">
            <text:p>646,138</text:p>
          </table:table-cell>
          <table:table-cell office:value-type="float" office:value="342833164" calcext:value-type="float">
            <text:p>342,833,1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ft</text:p>
          </table:table-cell>
          <table:table-cell office:value-type="string" calcext:value-type="string">
            <text:p>apenft</text:p>
          </table:table-cell>
          <table:table-cell office:value-type="float" office:value="0.000000325592" calcext:value-type="float">
            <text:p>0.00</text:p>
          </table:table-cell>
          <table:table-cell office:value-type="float" office:value="7354071" calcext:value-type="float">
            <text:p>7,354,071</text:p>
          </table:table-cell>
          <table:table-cell office:value-type="float" office:value="322424160" calcext:value-type="float">
            <text:p>322,424,16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no</text:p>
          </table:table-cell>
          <table:table-cell office:value-type="string" calcext:value-type="string">
            <text:p>gnosis</text:p>
          </table:table-cell>
          <table:table-cell office:value-type="float" office:value="121.84" calcext:value-type="float">
            <text:p>121.84</text:p>
          </table:table-cell>
          <table:table-cell office:value-type="float" office:value="3364271" calcext:value-type="float">
            <text:p>3,364,271</text:p>
          </table:table-cell>
          <table:table-cell office:value-type="float" office:value="321662857" calcext:value-type="float">
            <text:p>321,662,8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rv</text:p>
          </table:table-cell>
          <table:table-cell office:value-type="string" calcext:value-type="string">
            <text:p>curve-dao-token</text:p>
          </table:table-cell>
          <table:table-cell office:value-type="float" office:value="0.210612" calcext:value-type="float">
            <text:p>0.21</text:p>
          </table:table-cell>
          <table:table-cell office:value-type="float" office:value="51121105" calcext:value-type="float">
            <text:p>51,121,105</text:p>
          </table:table-cell>
          <table:table-cell office:value-type="float" office:value="314696201" calcext:value-type="float">
            <text:p>314,696,2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btt</text:p>
          </table:table-cell>
          <table:table-cell office:value-type="string" calcext:value-type="string">
            <text:p>bittorrent</text:p>
          </table:table-cell>
          <table:table-cell office:value-type="float" office:value="0.000000314047" calcext:value-type="float">
            <text:p>0.00</text:p>
          </table:table-cell>
          <table:table-cell office:value-type="float" office:value="7988644" calcext:value-type="float">
            <text:p>7,988,644</text:p>
          </table:table-cell>
          <table:table-cell office:value-type="float" office:value="309841422" calcext:value-type="float">
            <text:p>309,841,4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usdai</text:p>
          </table:table-cell>
          <table:table-cell office:value-type="float" office:value="1" calcext:value-type="float">
            <text:p>1.00</text:p>
          </table:table-cell>
          <table:table-cell office:value-type="float" office:value="551895" calcext:value-type="float">
            <text:p>551,895</text:p>
          </table:table-cell>
          <table:table-cell office:value-type="float" office:value="307249903" calcext:value-type="float">
            <text:p>307,249,90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vv</text:p>
          </table:table-cell>
          <table:table-cell table:style-name="ce8" office:value-type="string" calcext:value-type="string">
            <text:p>venice-token</text:p>
          </table:table-cell>
          <table:table-cell office:value-type="float" office:value="6.63" calcext:value-type="float">
            <text:p>6.63</text:p>
          </table:table-cell>
          <table:table-cell office:value-type="float" office:value="50088517" calcext:value-type="float">
            <text:p>50,088,517</text:p>
          </table:table-cell>
          <table:table-cell office:value-type="float" office:value="300123321" calcext:value-type="float">
            <text:p>300,123,32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river</text:p>
          </table:table-cell>
          <table:table-cell office:value-type="float" office:value="15.08" calcext:value-type="float">
            <text:p>15.08</text:p>
          </table:table-cell>
          <table:table-cell office:value-type="float" office:value="20823297" calcext:value-type="float">
            <text:p>20,823,297</text:p>
          </table:table-cell>
          <table:table-cell office:value-type="float" office:value="293701562" calcext:value-type="float">
            <text:p>293,701,5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ero</text:p>
          </table:table-cell>
          <table:table-cell office:value-type="string" calcext:value-type="string">
            <text:p>aerodrome-finance</text:p>
          </table:table-cell>
          <table:table-cell office:value-type="float" office:value="0.315858" calcext:value-type="float">
            <text:p>0.32</text:p>
          </table:table-cell>
          <table:table-cell office:value-type="float" office:value="9490639" calcext:value-type="float">
            <text:p>9,490,639</text:p>
          </table:table-cell>
          <table:table-cell office:value-type="float" office:value="293067318" calcext:value-type="float">
            <text:p>293,067,3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sv</text:p>
          </table:table-cell>
          <table:table-cell office:value-type="string" calcext:value-type="string">
            <text:p>bitcoin-cash-sv</text:p>
          </table:table-cell>
          <table:table-cell office:value-type="float" office:value="13.94" calcext:value-type="float">
            <text:p>13.94</text:p>
          </table:table-cell>
          <table:table-cell office:value-type="float" office:value="12744576" calcext:value-type="float">
            <text:p>12,744,576</text:p>
          </table:table-cell>
          <table:table-cell office:value-type="float" office:value="279157467" calcext:value-type="float">
            <text:p>279,157,46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injective-protocol</text:p>
          </table:table-cell>
          <table:table-cell office:value-type="float" office:value="2.78" calcext:value-type="float">
            <text:p>2.78</text:p>
          </table:table-cell>
          <table:table-cell office:value-type="float" office:value="43738649" calcext:value-type="float">
            <text:p>43,738,649</text:p>
          </table:table-cell>
          <table:table-cell office:value-type="float" office:value="278266230" calcext:value-type="float">
            <text:p>278,266,2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lido-dao</text:p>
          </table:table-cell>
          <table:table-cell office:value-type="float" office:value="0.323858" calcext:value-type="float">
            <text:p>0.32</text:p>
          </table:table-cell>
          <table:table-cell office:value-type="float" office:value="30133692" calcext:value-type="float">
            <text:p>30,133,692</text:p>
          </table:table-cell>
          <table:table-cell office:value-type="float" office:value="275213199" calcext:value-type="float">
            <text:p>275,213,19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kag</text:p>
          </table:table-cell>
          <table:table-cell office:value-type="string" calcext:value-type="string">
            <text:p>kinesis-silver</text:p>
          </table:table-cell>
          <table:table-cell office:value-type="float" office:value="72.92" calcext:value-type="float">
            <text:p>72.92</text:p>
          </table:table-cell>
          <table:table-cell office:value-type="float" office:value="1655197" calcext:value-type="float">
            <text:p>1,655,197</text:p>
          </table:table-cell>
          <table:table-cell office:value-type="float" office:value="275031148" calcext:value-type="float">
            <text:p>275,031,14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fx</text:p>
          </table:table-cell>
          <table:table-cell office:value-type="string" calcext:value-type="string">
            <text:p>conflux-token</text:p>
          </table:table-cell>
          <table:table-cell office:value-type="float" office:value="0.052665" calcext:value-type="float">
            <text:p>0.05</text:p>
          </table:table-cell>
          <table:table-cell office:value-type="float" office:value="16944149" calcext:value-type="float">
            <text:p>16,944,149</text:p>
          </table:table-cell>
          <table:table-cell office:value-type="float" office:value="273219075" calcext:value-type="float">
            <text:p>273,219,07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kaia</text:p>
          </table:table-cell>
          <table:table-cell office:value-type="float" office:value="0.04690442" calcext:value-type="float">
            <text:p>0.05</text:p>
          </table:table-cell>
          <table:table-cell office:value-type="float" office:value="10098579" calcext:value-type="float">
            <text:p>10,098,579</text:p>
          </table:table-cell>
          <table:table-cell office:value-type="float" office:value="274329264" calcext:value-type="float">
            <text:p>274,329,26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frax</text:p>
          </table:table-cell>
          <table:table-cell office:value-type="float" office:value="0.990678" calcext:value-type="float">
            <text:p>0.99</text:p>
          </table:table-cell>
          <table:table-cell office:value-type="float" office:value="2668353" calcext:value-type="float">
            <text:p>2,668,353</text:p>
          </table:table-cell>
          <table:table-cell office:value-type="float" office:value="273307861" calcext:value-type="float">
            <text:p>273,307,86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official-fo</text:p>
          </table:table-cell>
          <table:table-cell office:value-type="float" office:value="0.268202" calcext:value-type="float">
            <text:p>0.27</text:p>
          </table:table-cell>
          <table:table-cell office:value-type="float" office:value="460574" calcext:value-type="float">
            <text:p>460,574</text:p>
          </table:table-cell>
          <table:table-cell office:value-type="float" office:value="267570260" calcext:value-type="float">
            <text:p>267,570,26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kite-2</text:p>
          </table:table-cell>
          <table:table-cell office:value-type="float" office:value="0.147139" calcext:value-type="float">
            <text:p>0.15</text:p>
          </table:table-cell>
          <table:table-cell office:value-type="float" office:value="71550663" calcext:value-type="float">
            <text:p>71,550,663</text:p>
          </table:table-cell>
          <table:table-cell office:value-type="float" office:value="265327309" calcext:value-type="float">
            <text:p>265,327,30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z</text:p>
          </table:table-cell>
          <table:table-cell office:value-type="string" calcext:value-type="string">
            <text:p>doublezero</text:p>
          </table:table-cell>
          <table:table-cell office:value-type="float" office:value="0.076001" calcext:value-type="float">
            <text:p>0.08</text:p>
          </table:table-cell>
          <table:table-cell office:value-type="float" office:value="10201359" calcext:value-type="float">
            <text:p>10,201,359</text:p>
          </table:table-cell>
          <table:table-cell office:value-type="float" office:value="264084495" calcext:value-type="float">
            <text:p>264,084,49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crvusd</text:p>
          </table:table-cell>
          <table:table-cell office:value-type="float" office:value="0.998633" calcext:value-type="float">
            <text:p>1.00</text:p>
          </table:table-cell>
          <table:table-cell office:value-type="float" office:value="14632394" calcext:value-type="float">
            <text:p>14,632,394</text:p>
          </table:table-cell>
          <table:table-cell office:value-type="float" office:value="264035881" calcext:value-type="float">
            <text:p>264,035,88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jasmy</text:p>
          </table:table-cell>
          <table:table-cell office:value-type="string" calcext:value-type="string">
            <text:p>jasmycoin</text:p>
          </table:table-cell>
          <table:table-cell office:value-type="float" office:value="0.00530492" calcext:value-type="float">
            <text:p>0.01</text:p>
          </table:table-cell>
          <table:table-cell office:value-type="float" office:value="10773684" calcext:value-type="float">
            <text:p>10,773,684</text:p>
          </table:table-cell>
          <table:table-cell office:value-type="float" office:value="262301772" calcext:value-type="float">
            <text:p>262,301,7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floki</text:p>
          </table:table-cell>
          <table:table-cell office:value-type="float" office:value="0.00002699" calcext:value-type="float">
            <text:p>0.00</text:p>
          </table:table-cell>
          <table:table-cell office:value-type="float" office:value="21913144" calcext:value-type="float">
            <text:p>21,913,144</text:p>
          </table:table-cell>
          <table:table-cell office:value-type="float" office:value="260871390" calcext:value-type="float">
            <text:p>260,871,39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ia</text:p>
          </table:table-cell>
          <table:table-cell office:value-type="string" calcext:value-type="string">
            <text:p>celestia</text:p>
          </table:table-cell>
          <table:table-cell office:value-type="float" office:value="0.287491" calcext:value-type="float">
            <text:p>0.29</text:p>
          </table:table-cell>
          <table:table-cell office:value-type="float" office:value="21735754" calcext:value-type="float">
            <text:p>21,735,754</text:p>
          </table:table-cell>
          <table:table-cell office:value-type="float" office:value="258860748" calcext:value-type="float">
            <text:p>258,860,7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the-graph</text:p>
          </table:table-cell>
          <table:table-cell office:value-type="float" office:value="0.02377979" calcext:value-type="float">
            <text:p>0.02</text:p>
          </table:table-cell>
          <table:table-cell office:value-type="float" office:value="18439155" calcext:value-type="float">
            <text:p>18,439,155</text:p>
          </table:table-cell>
          <table:table-cell office:value-type="float" office:value="256134508" calcext:value-type="float">
            <text:p>256,134,50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iota</text:p>
          </table:table-cell>
          <table:table-cell office:value-type="float" office:value="0.058129" calcext:value-type="float">
            <text:p>0.06</text:p>
          </table:table-cell>
          <table:table-cell office:value-type="float" office:value="23834024" calcext:value-type="float">
            <text:p>23,834,024</text:p>
          </table:table-cell>
          <table:table-cell office:value-type="float" office:value="253891163" calcext:value-type="float">
            <text:p>253,891,16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pepe</text:p>
          </table:table-cell>
          <table:table-cell office:value-type="string" calcext:value-type="string">
            <text:p>ape-and-pepe</text:p>
          </table:table-cell>
          <table:table-cell office:value-type="float" office:value="0.0000012" calcext:value-type="float">
            <text:p>0.00</text:p>
          </table:table-cell>
          <table:table-cell office:value-type="float" office:value="42996955" calcext:value-type="float">
            <text:p>42,996,955</text:p>
          </table:table-cell>
          <table:table-cell office:value-type="float" office:value="251406278" calcext:value-type="float">
            <text:p>251,406,27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xpl</text:p>
          </table:table-cell>
          <table:table-cell office:value-type="string" calcext:value-type="string">
            <text:p>plasma</text:p>
          </table:table-cell>
          <table:table-cell office:value-type="float" office:value="0.106278" calcext:value-type="float">
            <text:p>0.11</text:p>
          </table:table-cell>
          <table:table-cell office:value-type="float" office:value="109598810" calcext:value-type="float">
            <text:p>109,598,810</text:p>
          </table:table-cell>
          <table:table-cell office:value-type="float" office:value="251619528" calcext:value-type="float">
            <text:p>251,619,52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d</text:p>
          </table:table-cell>
          <table:table-cell office:value-type="float" office:value="0.02311249" calcext:value-type="float">
            <text:p>0.02</text:p>
          </table:table-cell>
          <table:table-cell office:value-type="float" office:value="168958515" calcext:value-type="float">
            <text:p>168,958,515</text:p>
          </table:table-cell>
          <table:table-cell office:value-type="float" office:value="250320620" calcext:value-type="float">
            <text:p>250,320,62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px</text:p>
          </table:table-cell>
          <table:table-cell office:value-type="string" calcext:value-type="string">
            <text:p>spx6900</text:p>
          </table:table-cell>
          <table:table-cell office:value-type="float" office:value="0.264248" calcext:value-type="float">
            <text:p>0.26</text:p>
          </table:table-cell>
          <table:table-cell office:value-type="float" office:value="5079942" calcext:value-type="float">
            <text:p>5,079,942</text:p>
          </table:table-cell>
          <table:table-cell office:value-type="float" office:value="246195347" calcext:value-type="float">
            <text:p>246,195,3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lympus</text:p>
          </table:table-cell>
          <table:table-cell office:value-type="float" office:value="15.7" calcext:value-type="float">
            <text:p>15.70</text:p>
          </table:table-cell>
          <table:table-cell office:value-type="float" office:value="49509" calcext:value-type="float">
            <text:p>49,509</text:p>
          </table:table-cell>
          <table:table-cell office:value-type="float" office:value="245487274" calcext:value-type="float">
            <text:p>245,487,27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yrup</text:p>
          </table:table-cell>
          <table:table-cell office:value-type="float" office:value="0.207305" calcext:value-type="float">
            <text:p>0.21</text:p>
          </table:table-cell>
          <table:table-cell office:value-type="float" office:value="10341770" calcext:value-type="float">
            <text:p>10,341,770</text:p>
          </table:table-cell>
          <table:table-cell office:value-type="float" office:value="240191630" calcext:value-type="float">
            <text:p>240,191,6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edgex</text:p>
          </table:table-cell>
          <table:table-cell office:value-type="float" office:value="0.684464" calcext:value-type="float">
            <text:p>0.68</text:p>
          </table:table-cell>
          <table:table-cell office:value-type="float" office:value="47729839" calcext:value-type="float">
            <text:p>47,729,839</text:p>
          </table:table-cell>
          <table:table-cell office:value-type="float" office:value="239596776" calcext:value-type="float">
            <text:p>239,596,77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zbcn</text:p>
          </table:table-cell>
          <table:table-cell office:value-type="string" calcext:value-type="string">
            <text:p>zebec-network</text:p>
          </table:table-cell>
          <table:table-cell office:value-type="float" office:value="0.00239073" calcext:value-type="float">
            <text:p>0.00</text:p>
          </table:table-cell>
          <table:table-cell office:value-type="float" office:value="6312959" calcext:value-type="float">
            <text:p>6,312,959</text:p>
          </table:table-cell>
          <table:table-cell office:value-type="float" office:value="234261377" calcext:value-type="float">
            <text:p>234,261,37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optimism</text:p>
          </table:table-cell>
          <table:table-cell office:value-type="float" office:value="0.107085" calcext:value-type="float">
            <text:p>0.11</text:p>
          </table:table-cell>
          <table:table-cell office:value-type="float" office:value="53456860" calcext:value-type="float">
            <text:p>53,456,860</text:p>
          </table:table-cell>
          <table:table-cell office:value-type="float" office:value="228691986" calcext:value-type="float">
            <text:p>228,691,98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tse</text:p>
          </table:table-cell>
          <table:table-cell office:value-type="string" calcext:value-type="string">
            <text:p>btse-token</text:p>
          </table:table-cell>
          <table:table-cell office:value-type="float" office:value="1.41" calcext:value-type="float">
            <text:p>1.41</text:p>
          </table:table-cell>
          <table:table-cell office:value-type="float" office:value="2708240" calcext:value-type="float">
            <text:p>2,708,240</text:p>
          </table:table-cell>
          <table:table-cell office:value-type="float" office:value="228251115" calcext:value-type="float">
            <text:p>228,251,1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yth</text:p>
          </table:table-cell>
          <table:table-cell office:value-type="string" calcext:value-type="string">
            <text:p>pyth-network</text:p>
          </table:table-cell>
          <table:table-cell office:value-type="float" office:value="0.03819661" calcext:value-type="float">
            <text:p>0.04</text:p>
          </table:table-cell>
          <table:table-cell office:value-type="float" office:value="10855332" calcext:value-type="float">
            <text:p>10,855,332</text:p>
          </table:table-cell>
          <table:table-cell office:value-type="float" office:value="219482165" calcext:value-type="float">
            <text:p>219,482,16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sda</text:p>
          </table:table-cell>
          <table:table-cell office:value-type="string" calcext:value-type="string">
            <text:p>usda-2</text:p>
          </table:table-cell>
          <table:table-cell office:value-type="float" office:value="0.985203" calcext:value-type="float">
            <text:p>0.99</text:p>
          </table:table-cell>
          <table:table-cell office:value-type="float" office:value="49.45" calcext:value-type="float">
            <text:p>49</text:p>
          </table:table-cell>
          <table:table-cell office:value-type="float" office:value="217432209" calcext:value-type="float">
            <text:p>217,432,20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usd</text:p>
          </table:table-cell>
          <table:table-cell office:value-type="string" calcext:value-type="string">
            <text:p>agora-dollar</text:p>
          </table:table-cell>
          <table:table-cell office:value-type="float" office:value="0.999861" calcext:value-type="float">
            <text:p>1.00</text:p>
          </table:table-cell>
          <table:table-cell office:value-type="float" office:value="20778183" calcext:value-type="float">
            <text:p>20,778,183</text:p>
          </table:table-cell>
          <table:table-cell office:value-type="float" office:value="216389761" calcext:value-type="float">
            <text:p>216,389,76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ethereum-name-service</text:p>
          </table:table-cell>
          <table:table-cell office:value-type="float" office:value="5.56" calcext:value-type="float">
            <text:p>5.56</text:p>
          </table:table-cell>
          <table:table-cell office:value-type="float" office:value="18642871" calcext:value-type="float">
            <text:p>18,642,871</text:p>
          </table:table-cell>
          <table:table-cell office:value-type="float" office:value="213445220" calcext:value-type="float">
            <text:p>213,445,22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sn</text:p>
          </table:table-cell>
          <table:table-cell office:value-type="string" calcext:value-type="string">
            <text:p>vision-3</text:p>
          </table:table-cell>
          <table:table-cell office:value-type="float" office:value="0.058379" calcext:value-type="float">
            <text:p>0.06</text:p>
          </table:table-cell>
          <table:table-cell office:value-type="float" office:value="10086969" calcext:value-type="float">
            <text:p>10,086,969</text:p>
          </table:table-cell>
          <table:table-cell office:value-type="float" office:value="213364987" calcext:value-type="float">
            <text:p>213,364,98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uds</text:p>
          </table:table-cell>
          <table:table-cell office:value-type="string" calcext:value-type="string">
            <text:p>undeads-games</text:p>
          </table:table-cell>
          <table:table-cell office:value-type="float" office:value="1.71" calcext:value-type="float">
            <text:p>1.71</text:p>
          </table:table-cell>
          <table:table-cell office:value-type="float" office:value="228353" calcext:value-type="float">
            <text:p>228,353</text:p>
          </table:table-cell>
          <table:table-cell office:value-type="float" office:value="212831784" calcext:value-type="float">
            <text:p>212,831,78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lighter</text:p>
          </table:table-cell>
          <table:table-cell office:value-type="float" office:value="0.84554" calcext:value-type="float">
            <text:p>0.85</text:p>
          </table:table-cell>
          <table:table-cell office:value-type="float" office:value="26389350" calcext:value-type="float">
            <text:p>26,389,350</text:p>
          </table:table-cell>
          <table:table-cell office:value-type="float" office:value="211274635" calcext:value-type="float">
            <text:p>211,274,63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9bit</text:p>
          </table:table-cell>
          <table:table-cell office:value-type="string" calcext:value-type="string">
            <text:p>the9bit</text:p>
          </table:table-cell>
          <table:table-cell office:value-type="float" office:value="0.0257438" calcext:value-type="float">
            <text:p>0.03</text:p>
          </table:table-cell>
          <table:table-cell office:value-type="float" office:value="4497069" calcext:value-type="float">
            <text:p>4,497,069</text:p>
          </table:table-cell>
          <table:table-cell office:value-type="float" office:value="211165648" calcext:value-type="float">
            <text:p>211,165,6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telcoin</text:p>
          </table:table-cell>
          <table:table-cell office:value-type="float" office:value="0.00221838" calcext:value-type="float">
            <text:p>0.00</text:p>
          </table:table-cell>
          <table:table-cell office:value-type="float" office:value="1683936" calcext:value-type="float">
            <text:p>1,683,936</text:p>
          </table:table-cell>
          <table:table-cell office:value-type="float" office:value="211199090" calcext:value-type="float">
            <text:p>211,199,09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cap</text:p>
          </table:table-cell>
          <table:table-cell office:value-type="string" calcext:value-type="string">
            <text:p>blockchain-capital</text:p>
          </table:table-cell>
          <table:table-cell office:value-type="float" office:value="23.01" calcext:value-type="float">
            <text:p>23.01</text:p>
          </table:table-cell>
          <table:table-cell office:value-type="float" office:value="0" calcext:value-type="float">
            <text:p>0</text:p>
          </table:table-cell>
          <table:table-cell office:value-type="float" office:value="209669674" calcext:value-type="float">
            <text:p>209,669,67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ild-on</text:p>
          </table:table-cell>
          <table:table-cell office:value-type="float" office:value="0.202557" calcext:value-type="float">
            <text:p>0.20</text:p>
          </table:table-cell>
          <table:table-cell office:value-type="float" office:value="3886031" calcext:value-type="float">
            <text:p>3,886,031</text:p>
          </table:table-cell>
          <table:table-cell office:value-type="float" office:value="202552879" calcext:value-type="float">
            <text:p>202,552,87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the-sandbox</text:p>
          </table:table-cell>
          <table:table-cell office:value-type="float" office:value="0.074637" calcext:value-type="float">
            <text:p>0.07</text:p>
          </table:table-cell>
          <table:table-cell office:value-type="float" office:value="21413138" calcext:value-type="float">
            <text:p>21,413,138</text:p>
          </table:table-cell>
          <table:table-cell office:value-type="float" office:value="198998048" calcext:value-type="float">
            <text:p>198,998,04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lunc</text:p>
          </table:table-cell>
          <table:table-cell office:value-type="string" calcext:value-type="string">
            <text:p>terra-luna</text:p>
          </table:table-cell>
          <table:table-cell office:value-type="float" office:value="0.00003631" calcext:value-type="float">
            <text:p>0.00</text:p>
          </table:table-cell>
          <table:table-cell office:value-type="float" office:value="7112434" calcext:value-type="float">
            <text:p>7,112,434</text:p>
          </table:table-cell>
          <table:table-cell office:value-type="float" office:value="198532540" calcext:value-type="float">
            <text:p>198,532,54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rk</text:p>
          </table:table-cell>
          <table:table-cell office:value-type="string" calcext:value-type="string">
            <text:p>starknet</text:p>
          </table:table-cell>
          <table:table-cell office:value-type="float" office:value="0.03410849" calcext:value-type="float">
            <text:p>0.03</text:p>
          </table:table-cell>
          <table:table-cell office:value-type="float" office:value="14372853" calcext:value-type="float">
            <text:p>14,372,853</text:p>
          </table:table-cell>
          <table:table-cell office:value-type="float" office:value="194163550" calcext:value-type="float">
            <text:p>194,163,55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nt</text:p>
          </table:table-cell>
          <table:table-cell office:value-type="string" calcext:value-type="string">
            <text:p>helium</text:p>
          </table:table-cell>
          <table:table-cell office:value-type="float" office:value="1.051" calcext:value-type="float">
            <text:p>1.05</text:p>
          </table:table-cell>
          <table:table-cell office:value-type="float" office:value="3618190" calcext:value-type="float">
            <text:p>3,618,190</text:p>
          </table:table-cell>
          <table:table-cell office:value-type="float" office:value="193902165" calcext:value-type="float">
            <text:p>193,902,16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neo</text:p>
          </table:table-cell>
          <table:table-cell office:value-type="float" office:value="2.7" calcext:value-type="float">
            <text:p>2.70</text:p>
          </table:table-cell>
          <table:table-cell office:value-type="float" office:value="14069955" calcext:value-type="float">
            <text:p>14,069,955</text:p>
          </table:table-cell>
          <table:table-cell office:value-type="float" office:value="190333176" calcext:value-type="float">
            <text:p>190,333,17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c0000031</text:p>
          </table:table-cell>
          <table:table-cell office:value-type="string" calcext:value-type="string">
            <text:p>tradable-na-rent-financing-platform-sstn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office:value-type="float" office:value="189500000" calcext:value-type="float">
            <text:p>189,500,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xs</text:p>
          </table:table-cell>
          <table:table-cell office:value-type="string" calcext:value-type="string">
            <text:p>axie-infinity</text:p>
          </table:table-cell>
          <table:table-cell office:value-type="float" office:value="1.11" calcext:value-type="float">
            <text:p>1.11</text:p>
          </table:table-cell>
          <table:table-cell office:value-type="float" office:value="27369350" calcext:value-type="float">
            <text:p>27,369,350</text:p>
          </table:table-cell>
          <table:table-cell office:value-type="float" office:value="187486380" calcext:value-type="float">
            <text:p>187,486,38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reusd</text:p>
          </table:table-cell>
          <table:table-cell office:value-type="string" calcext:value-type="string">
            <text:p>re-protocol-reusd</text:p>
          </table:table-cell>
          <table:table-cell office:value-type="float" office:value="1.069" calcext:value-type="float">
            <text:p>1.07</text:p>
          </table:table-cell>
          <table:table-cell office:value-type="float" office:value="1140451" calcext:value-type="float">
            <text:p>1,140,451</text:p>
          </table:table-cell>
          <table:table-cell office:value-type="float" office:value="187015861" calcext:value-type="float">
            <text:p>187,015,86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wfi</text:p>
          </table:table-cell>
          <table:table-cell office:value-type="string" calcext:value-type="string">
            <text:p>wefi</text:p>
          </table:table-cell>
          <table:table-cell office:value-type="float" office:value="2.27" calcext:value-type="float">
            <text:p>2.27</text:p>
          </table:table-cell>
          <table:table-cell office:value-type="float" office:value="3707890" calcext:value-type="float">
            <text:p>3,707,890</text:p>
          </table:table-cell>
          <table:table-cell office:value-type="float" office:value="186891506" calcext:value-type="float">
            <text:p>186,891,50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pendle</text:p>
          </table:table-cell>
          <table:table-cell office:value-type="float" office:value="1.1" calcext:value-type="float">
            <text:p>1.10</text:p>
          </table:table-cell>
          <table:table-cell office:value-type="float" office:value="21082729" calcext:value-type="float">
            <text:p>21,082,729</text:p>
          </table:table-cell>
          <table:table-cell office:value-type="float" office:value="183380120" calcext:value-type="float">
            <text:p>183,380,1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reallink</text:p>
          </table:table-cell>
          <table:table-cell office:value-type="float" office:value="0.057222" calcext:value-type="float">
            <text:p>0.06</text:p>
          </table:table-cell>
          <table:table-cell office:value-type="float" office:value="4528742" calcext:value-type="float">
            <text:p>4,528,742</text:p>
          </table:table-cell>
          <table:table-cell office:value-type="float" office:value="181771421" calcext:value-type="float">
            <text:p>181,771,42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org</text:p>
          </table:table-cell>
          <table:table-cell office:value-type="string" calcext:value-type="string">
            <text:p>swissborg</text:p>
          </table:table-cell>
          <table:table-cell office:value-type="float" office:value="0.181909" calcext:value-type="float">
            <text:p>0.18</text:p>
          </table:table-cell>
          <table:table-cell office:value-type="float" office:value="335402" calcext:value-type="float">
            <text:p>335,402</text:p>
          </table:table-cell>
          <table:table-cell office:value-type="float" office:value="178458454" calcext:value-type="float">
            <text:p>178,458,45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xcn</text:p>
          </table:table-cell>
          <table:table-cell office:value-type="string" calcext:value-type="string">
            <text:p>chain-2</text:p>
          </table:table-cell>
          <table:table-cell office:value-type="float" office:value="0.00472422" calcext:value-type="float">
            <text:p>0.00</text:p>
          </table:table-cell>
          <table:table-cell office:value-type="float" office:value="7067333" calcext:value-type="float">
            <text:p>7,067,333</text:p>
          </table:table-cell>
          <table:table-cell office:value-type="float" office:value="178181991" calcext:value-type="float">
            <text:p>178,181,9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siren-2</text:p>
          </table:table-cell>
          <table:table-cell office:value-type="float" office:value="0.243727" calcext:value-type="float">
            <text:p>0.24</text:p>
          </table:table-cell>
          <table:table-cell office:value-type="float" office:value="77610174" calcext:value-type="float">
            <text:p>77,610,174</text:p>
          </table:table-cell>
          <table:table-cell office:value-type="float" office:value="177487877" calcext:value-type="float">
            <text:p>177,487,87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nusd</text:p>
          </table:table-cell>
          <table:table-cell office:value-type="string" calcext:value-type="string">
            <text:p>nusd-2</text:p>
          </table:table-cell>
          <table:table-cell office:value-type="float" office:value="0.999236" calcext:value-type="float">
            <text:p>1.00</text:p>
          </table:table-cell>
          <table:table-cell office:value-type="float" office:value="849627" calcext:value-type="float">
            <text:p>849,627</text:p>
          </table:table-cell>
          <table:table-cell office:value-type="float" office:value="177021671" calcext:value-type="float">
            <text:p>177,021,6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wif</text:p>
          </table:table-cell>
          <table:table-cell office:value-type="string" calcext:value-type="string">
            <text:p>dogwifcoin</text:p>
          </table:table-cell>
          <table:table-cell office:value-type="float" office:value="0.17565" calcext:value-type="float">
            <text:p>0.18</text:p>
          </table:table-cell>
          <table:table-cell office:value-type="float" office:value="54830728" calcext:value-type="float">
            <text:p>54,830,728</text:p>
          </table:table-cell>
          <table:table-cell office:value-type="float" office:value="175737577" calcext:value-type="float">
            <text:p>175,737,57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stbl</text:p>
          </table:table-cell>
          <table:table-cell office:value-type="string" calcext:value-type="string">
            <text:p>spiko-us-t-bills-money-market-fund</text:p>
          </table:table-cell>
          <table:table-cell office:value-type="float" office:value="1.079" calcext:value-type="float">
            <text:p>1.08</text:p>
          </table:table-cell>
          <table:table-cell office:value-type="float" office:value="49.95" calcext:value-type="float">
            <text:p>50</text:p>
          </table:table-cell>
          <table:table-cell office:value-type="float" office:value="174185847" calcext:value-type="float">
            <text:p>174,185,84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story-2</text:p>
          </table:table-cell>
          <table:table-cell office:value-type="float" office:value="0.49227" calcext:value-type="float">
            <text:p>0.49</text:p>
          </table:table-cell>
          <table:table-cell office:value-type="float" office:value="41445775" calcext:value-type="float">
            <text:p>41,445,775</text:p>
          </table:table-cell>
          <table:table-cell office:value-type="float" office:value="173513739" calcext:value-type="float">
            <text:p>173,513,73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raydium</text:p>
          </table:table-cell>
          <table:table-cell office:value-type="float" office:value="0.639625" calcext:value-type="float">
            <text:p>0.64</text:p>
          </table:table-cell>
          <table:table-cell office:value-type="float" office:value="121041664" calcext:value-type="float">
            <text:p>121,041,664</text:p>
          </table:table-cell>
          <table:table-cell office:value-type="float" office:value="171867249" calcext:value-type="float">
            <text:p>171,867,24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decentraland</text:p>
          </table:table-cell>
          <table:table-cell office:value-type="float" office:value="0.086103" calcext:value-type="float">
            <text:p>0.09</text:p>
          </table:table-cell>
          <table:table-cell office:value-type="float" office:value="18480417" calcext:value-type="float">
            <text:p>18,480,417</text:p>
          </table:table-cell>
          <table:table-cell office:value-type="float" office:value="166648293" calcext:value-type="float">
            <text:p>166,648,2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ic-3</text:p>
          </table:table-cell>
          <table:table-cell office:value-type="float" office:value="0.04365949" calcext:value-type="float">
            <text:p>0.04</text:p>
          </table:table-cell>
          <table:table-cell office:value-type="float" office:value="34917266" calcext:value-type="float">
            <text:p>34,917,266</text:p>
          </table:table-cell>
          <table:table-cell office:value-type="float" office:value="165307498" calcext:value-type="float">
            <text:p>165,307,49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fartcoin</text:p>
          </table:table-cell>
          <table:table-cell table:style-name="ce2" office:value-type="string" calcext:value-type="string">
            <text:p>fartcoin</text:p>
          </table:table-cell>
          <table:table-cell office:value-type="float" office:value="0.164671" calcext:value-type="float">
            <text:p>0.16</text:p>
          </table:table-cell>
          <table:table-cell office:value-type="float" office:value="76117068" calcext:value-type="float">
            <text:p>76,117,068</text:p>
          </table:table-cell>
          <table:table-cell office:value-type="float" office:value="164638095" calcext:value-type="float">
            <text:p>164,638,09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lcon-finance-ff</text:p>
          </table:table-cell>
          <table:table-cell office:value-type="float" office:value="0.070272" calcext:value-type="float">
            <text:p>0.07</text:p>
          </table:table-cell>
          <table:table-cell office:value-type="float" office:value="8504031" calcext:value-type="float">
            <text:p>8,504,031</text:p>
          </table:table-cell>
          <table:table-cell office:value-type="float" office:value="164403144" calcext:value-type="float">
            <text:p>164,403,1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x-token</text:p>
          </table:table-cell>
          <table:table-cell office:value-type="float" office:value="1.79" calcext:value-type="float">
            <text:p>1.79</text:p>
          </table:table-cell>
          <table:table-cell office:value-type="float" office:value="9835910" calcext:value-type="float">
            <text:p>9,835,910</text:p>
          </table:table-cell>
          <table:table-cell office:value-type="float" office:value="164102888" calcext:value-type="float">
            <text:p>164,102,8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zk</text:p>
          </table:table-cell>
          <table:table-cell office:value-type="string" calcext:value-type="string">
            <text:p>zksync</text:p>
          </table:table-cell>
          <table:table-cell office:value-type="float" office:value="0.01706492" calcext:value-type="float">
            <text:p>0.02</text:p>
          </table:table-cell>
          <table:table-cell office:value-type="float" office:value="9912461" calcext:value-type="float">
            <text:p>9,912,461</text:p>
          </table:table-cell>
          <table:table-cell office:value-type="float" office:value="163951009" calcext:value-type="float">
            <text:p>163,951,00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wt</text:p>
          </table:table-cell>
          <table:table-cell office:value-type="string" calcext:value-type="string">
            <text:p>trust-wallet-token</text:p>
          </table:table-cell>
          <table:table-cell office:value-type="float" office:value="0.391929" calcext:value-type="float">
            <text:p>0.39</text:p>
          </table:table-cell>
          <table:table-cell office:value-type="float" office:value="36337696" calcext:value-type="float">
            <text:p>36,337,696</text:p>
          </table:table-cell>
          <table:table-cell office:value-type="float" office:value="163205944" calcext:value-type="float">
            <text:p>163,205,9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koge</text:p>
          </table:table-cell>
          <table:table-cell office:value-type="string" calcext:value-type="string">
            <text:p>bnb48-club-token</text:p>
          </table:table-cell>
          <table:table-cell office:value-type="float" office:value="47.99" calcext:value-type="float">
            <text:p>47.99</text:p>
          </table:table-cell>
          <table:table-cell office:value-type="float" office:value="29712578" calcext:value-type="float">
            <text:p>29,712,578</text:p>
          </table:table-cell>
          <table:table-cell office:value-type="float" office:value="162204457" calcext:value-type="float">
            <text:p>162,204,45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fdit</text:p>
          </table:table-cell>
          <table:table-cell office:value-type="string" calcext:value-type="string">
            <text:p>fidelity-digital-interest-token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office:value-type="float" office:value="161927017" calcext:value-type="float">
            <text:p>161,927,01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compound-governance-token</text:p>
          </table:table-cell>
          <table:table-cell office:value-type="float" office:value="16.68" calcext:value-type="float">
            <text:p>16.68</text:p>
          </table:table-cell>
          <table:table-cell office:value-type="float" office:value="32319096" calcext:value-type="float">
            <text:p>32,319,096</text:p>
          </table:table-cell>
          <table:table-cell office:value-type="float" office:value="161263171" calcext:value-type="float">
            <text:p>161,263,17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newton-project</text:p>
          </table:table-cell>
          <table:table-cell office:value-type="float" office:value="0.00161984" calcext:value-type="float">
            <text:p>0.00</text:p>
          </table:table-cell>
          <table:table-cell office:value-type="float" office:value="4767353" calcext:value-type="float">
            <text:p>4,767,353</text:p>
          </table:table-cell>
          <table:table-cell office:value-type="float" office:value="159555766" calcext:value-type="float">
            <text:p>159,555,76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wal</text:p>
          </table:table-cell>
          <table:table-cell office:value-type="string" calcext:value-type="string">
            <text:p>walrus-2</text:p>
          </table:table-cell>
          <table:table-cell office:value-type="float" office:value="0.069184" calcext:value-type="float">
            <text:p>0.07</text:p>
          </table:table-cell>
          <table:table-cell office:value-type="float" office:value="7535527" calcext:value-type="float">
            <text:p>7,535,527</text:p>
          </table:table-cell>
          <table:table-cell office:value-type="float" office:value="159099151" calcext:value-type="float">
            <text:p>159,099,15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atusd</text:p>
          </table:table-cell>
          <table:table-cell office:value-type="string" calcext:value-type="string">
            <text:p>satoshi-stablecoin</text:p>
          </table:table-cell>
          <table:table-cell office:value-type="float" office:value="0.996996" calcext:value-type="float">
            <text:p>1.00</text:p>
          </table:table-cell>
          <table:table-cell office:value-type="float" office:value="31082" calcext:value-type="float">
            <text:p>31,082</text:p>
          </table:table-cell>
          <table:table-cell office:value-type="float" office:value="158768753" calcext:value-type="float">
            <text:p>158,768,75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0.279519" calcext:value-type="float">
            <text:p>0.28</text:p>
          </table:table-cell>
          <table:table-cell office:value-type="float" office:value="8664043" calcext:value-type="float">
            <text:p>8,664,043</text:p>
          </table:table-cell>
          <table:table-cell office:value-type="float" office:value="157828718" calcext:value-type="float">
            <text:p>157,828,7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urs</text:p>
          </table:table-cell>
          <table:table-cell office:value-type="string" calcext:value-type="string">
            <text:p>stasis-eurs</text:p>
          </table:table-cell>
          <table:table-cell office:value-type="float" office:value="1.24" calcext:value-type="float">
            <text:p>1.24</text:p>
          </table:table-cell>
          <table:table-cell office:value-type="float" office:value="19053.25" calcext:value-type="float">
            <text:p>19,053</text:p>
          </table:table-cell>
          <table:table-cell office:value-type="float" office:value="153530331" calcext:value-type="float">
            <text:p>153,530,3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vx</text:p>
          </table:table-cell>
          <table:table-cell office:value-type="string" calcext:value-type="string">
            <text:p>convex-finance</text:p>
          </table:table-cell>
          <table:table-cell office:value-type="float" office:value="1.71" calcext:value-type="float">
            <text:p>1.71</text:p>
          </table:table-cell>
          <table:table-cell office:value-type="float" office:value="8372669" calcext:value-type="float">
            <text:p>8,372,669</text:p>
          </table:table-cell>
          <table:table-cell office:value-type="float" office:value="153130059" calcext:value-type="float">
            <text:p>153,130,0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zano</text:p>
          </table:table-cell>
          <table:table-cell office:value-type="float" office:value="9.85" calcext:value-type="float">
            <text:p>9.85</text:p>
          </table:table-cell>
          <table:table-cell office:value-type="float" office:value="1888673" calcext:value-type="float">
            <text:p>1,888,673</text:p>
          </table:table-cell>
          <table:table-cell office:value-type="float" office:value="149882269" calcext:value-type="float">
            <text:p>149,882,26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gusd</text:p>
          </table:table-cell>
          <table:table-cell office:value-type="float" office:value="0.999818" calcext:value-type="float">
            <text:p>1.00</text:p>
          </table:table-cell>
          <table:table-cell office:value-type="float" office:value="1810667" calcext:value-type="float">
            <text:p>1,810,667</text:p>
          </table:table-cell>
          <table:table-cell office:value-type="float" office:value="149627993" calcext:value-type="float">
            <text:p>149,627,99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umanity</text:p>
          </table:table-cell>
          <table:table-cell office:value-type="float" office:value="0.081522" calcext:value-type="float">
            <text:p>0.08</text:p>
          </table:table-cell>
          <table:table-cell office:value-type="float" office:value="7531361" calcext:value-type="float">
            <text:p>7,531,361</text:p>
          </table:table-cell>
          <table:table-cell office:value-type="float" office:value="148764442" calcext:value-type="float">
            <text:p>148,764,44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lying-tulip</text:p>
          </table:table-cell>
          <table:table-cell office:value-type="float" office:value="0.095929" calcext:value-type="float">
            <text:p>0.10</text:p>
          </table:table-cell>
          <table:table-cell office:value-type="float" office:value="136253" calcext:value-type="float">
            <text:p>136,253</text:p>
          </table:table-cell>
          <table:table-cell office:value-type="float" office:value="148351419" calcext:value-type="float">
            <text:p>148,351,41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heta-token</text:p>
          </table:table-cell>
          <table:table-cell office:value-type="float" office:value="0.147492" calcext:value-type="float">
            <text:p>0.15</text:p>
          </table:table-cell>
          <table:table-cell office:value-type="float" office:value="11147081" calcext:value-type="float">
            <text:p>11,147,081</text:p>
          </table:table-cell>
          <table:table-cell office:value-type="float" office:value="147327612" calcext:value-type="float">
            <text:p>147,327,61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onyc</text:p>
          </table:table-cell>
          <table:table-cell office:value-type="float" office:value="1.089" calcext:value-type="float">
            <text:p>1.09</text:p>
          </table:table-cell>
          <table:table-cell office:value-type="float" office:value="10376059" calcext:value-type="float">
            <text:p>10,376,059</text:p>
          </table:table-cell>
          <table:table-cell office:value-type="float" office:value="146356020" calcext:value-type="float">
            <text:p>146,356,02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asic-attention-token</text:p>
          </table:table-cell>
          <table:table-cell office:value-type="float" office:value="0.097086" calcext:value-type="float">
            <text:p>0.10</text:p>
          </table:table-cell>
          <table:table-cell office:value-type="float" office:value="17312213" calcext:value-type="float">
            <text:p>17,312,213</text:p>
          </table:table-cell>
          <table:table-cell office:value-type="float" office:value="145249701" calcext:value-type="float">
            <text:p>145,249,7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rune</text:p>
          </table:table-cell>
          <table:table-cell office:value-type="string" calcext:value-type="string">
            <text:p>thorchain</text:p>
          </table:table-cell>
          <table:table-cell office:value-type="float" office:value="0.403171" calcext:value-type="float">
            <text:p>0.40</text:p>
          </table:table-cell>
          <table:table-cell office:value-type="float" office:value="28331904" calcext:value-type="float">
            <text:p>28,331,904</text:p>
          </table:table-cell>
          <table:table-cell office:value-type="float" office:value="141493718" calcext:value-type="float">
            <text:p>141,493,7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fp</text:p>
          </table:table-cell>
          <table:table-cell office:value-type="string" calcext:value-type="string">
            <text:p>safepal</text:p>
          </table:table-cell>
          <table:table-cell office:value-type="float" office:value="0.279919" calcext:value-type="float">
            <text:p>0.28</text:p>
          </table:table-cell>
          <table:table-cell office:value-type="float" office:value="1749278" calcext:value-type="float">
            <text:p>1,749,278</text:p>
          </table:table-cell>
          <table:table-cell office:value-type="float" office:value="139959520" calcext:value-type="float">
            <text:p>139,959,52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stakestone</text:p>
          </table:table-cell>
          <table:table-cell office:value-type="float" office:value="0.605724" calcext:value-type="float">
            <text:p>0.61</text:p>
          </table:table-cell>
          <table:table-cell office:value-type="float" office:value="578191830" calcext:value-type="float">
            <text:p>578,191,830</text:p>
          </table:table-cell>
          <table:table-cell office:value-type="float" office:value="136527799" calcext:value-type="float">
            <text:p>136,527,79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gala</text:p>
          </table:table-cell>
          <table:table-cell office:value-type="float" office:value="0.00286047" calcext:value-type="float">
            <text:p>0.00</text:p>
          </table:table-cell>
          <table:table-cell office:value-type="float" office:value="16133017" calcext:value-type="float">
            <text:p>16,133,017</text:p>
          </table:table-cell>
          <table:table-cell office:value-type="float" office:value="135965003" calcext:value-type="float">
            <text:p>135,965,00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qrl</text:p>
          </table:table-cell>
          <table:table-cell office:value-type="string" calcext:value-type="string">
            <text:p>quantum-resistant-ledger</text:p>
          </table:table-cell>
          <table:table-cell office:value-type="float" office:value="1.7" calcext:value-type="float">
            <text:p>1.70</text:p>
          </table:table-cell>
          <table:table-cell office:value-type="float" office:value="373775" calcext:value-type="float">
            <text:p>373,775</text:p>
          </table:table-cell>
          <table:table-cell office:value-type="float" office:value="132936806" calcext:value-type="float">
            <text:p>132,936,80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rclon</text:p>
          </table:table-cell>
          <table:table-cell office:value-type="string" calcext:value-type="string">
            <text:p>circle-internet-group-ondo-tokenized-stock</text:p>
          </table:table-cell>
          <table:table-cell office:value-type="float" office:value="88.57" calcext:value-type="float">
            <text:p>88.57</text:p>
          </table:table-cell>
          <table:table-cell office:value-type="float" office:value="7357160" calcext:value-type="float">
            <text:p>7,357,160</text:p>
          </table:table-cell>
          <table:table-cell office:value-type="float" office:value="134556663" calcext:value-type="float">
            <text:p>134,556,66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bananas31</text:p>
          </table:table-cell>
          <table:table-cell office:value-type="string" calcext:value-type="string">
            <text:p>banana-for-scale-2</text:p>
          </table:table-cell>
          <table:table-cell office:value-type="float" office:value="0.01338816" calcext:value-type="float">
            <text:p>0.01</text:p>
          </table:table-cell>
          <table:table-cell office:value-type="float" office:value="22254485" calcext:value-type="float">
            <text:p>22,254,485</text:p>
          </table:table-cell>
          <table:table-cell office:value-type="float" office:value="133638955" calcext:value-type="float">
            <text:p>133,638,95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xec</text:p>
          </table:table-cell>
          <table:table-cell office:value-type="string" calcext:value-type="string">
            <text:p>ecash</text:p>
          </table:table-cell>
          <table:table-cell office:value-type="float" office:value="0.00000667" calcext:value-type="float">
            <text:p>0.00</text:p>
          </table:table-cell>
          <table:table-cell office:value-type="float" office:value="4352574" calcext:value-type="float">
            <text:p>4,352,574</text:p>
          </table:table-cell>
          <table:table-cell office:value-type="float" office:value="133597088" calcext:value-type="float">
            <text:p>133,597,08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hbill</text:p>
          </table:table-cell>
          <table:table-cell office:value-type="string" calcext:value-type="string">
            <text:p>theo-short-duration-us-treasury-fund</text:p>
          </table:table-cell>
          <table:table-cell office:value-type="float" office:value="1.018" calcext:value-type="float">
            <text:p>1.02</text:p>
          </table:table-cell>
          <table:table-cell office:value-type="float" office:value="314266" calcext:value-type="float">
            <text:p>314,266</text:p>
          </table:table-cell>
          <table:table-cell office:value-type="float" office:value="131951263" calcext:value-type="float">
            <text:p>131,951,26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cred</text:p>
          </table:table-cell>
          <table:table-cell office:value-type="string" calcext:value-type="string">
            <text:p>apollo-diversified-credit-securitize-fund</text:p>
          </table:table-cell>
          <table:table-cell office:value-type="float" office:value="1093.47" calcext:value-type="float">
            <text:p>1,093.47</text:p>
          </table:table-cell>
          <table:table-cell office:value-type="float" office:value="0" calcext:value-type="float">
            <text:p>0</text:p>
          </table:table-cell>
          <table:table-cell office:value-type="float" office:value="131150777" calcext:value-type="float">
            <text:p>131,150,77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ultima</text:p>
          </table:table-cell>
          <table:table-cell office:value-type="float" office:value="3461.56" calcext:value-type="float">
            <text:p>3,461.56</text:p>
          </table:table-cell>
          <table:table-cell office:value-type="float" office:value="6009462" calcext:value-type="float">
            <text:p>6,009,462</text:p>
          </table:table-cell>
          <table:table-cell office:value-type="float" office:value="130463357" calcext:value-type="float">
            <text:p>130,463,35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qubic</text:p>
          </table:table-cell>
          <table:table-cell office:value-type="string" calcext:value-type="string">
            <text:p>qubic-network</text:p>
          </table:table-cell>
          <table:table-cell office:value-type="float" office:value="0.000000955126" calcext:value-type="float">
            <text:p>0.00</text:p>
          </table:table-cell>
          <table:table-cell office:value-type="float" office:value="3829866" calcext:value-type="float">
            <text:p>3,829,866</text:p>
          </table:table-cell>
          <table:table-cell office:value-type="float" office:value="130218124" calcext:value-type="float">
            <text:p>130,218,1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oso</text:p>
          </table:table-cell>
          <table:table-cell office:value-type="string" calcext:value-type="string">
            <text:p>sosovalue</text:p>
          </table:table-cell>
          <table:table-cell office:value-type="float" office:value="0.411371" calcext:value-type="float">
            <text:p>0.41</text:p>
          </table:table-cell>
          <table:table-cell office:value-type="float" office:value="3426075" calcext:value-type="float">
            <text:p>3,426,075</text:p>
          </table:table-cell>
          <table:table-cell office:value-type="float" office:value="128358259" calcext:value-type="float">
            <text:p>128,358,25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aethir</text:p>
          </table:table-cell>
          <table:table-cell office:value-type="float" office:value="0.00690879" calcext:value-type="float">
            <text:p>0.01</text:p>
          </table:table-cell>
          <table:table-cell office:value-type="float" office:value="15857954" calcext:value-type="float">
            <text:p>15,857,954</text:p>
          </table:table-cell>
          <table:table-cell office:value-type="float" office:value="126703273" calcext:value-type="float">
            <text:p>126,703,27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vusd</text:p>
          </table:table-cell>
          <table:table-cell office:value-type="string" calcext:value-type="string">
            <text:p>avant-usd</text:p>
          </table:table-cell>
          <table:table-cell office:value-type="float" office:value="0.999207" calcext:value-type="float">
            <text:p>1.00</text:p>
          </table:table-cell>
          <table:table-cell office:value-type="float" office:value="162522" calcext:value-type="float">
            <text:p>162,522</text:p>
          </table:table-cell>
          <table:table-cell office:value-type="float" office:value="126602934" calcext:value-type="float">
            <text:p>126,602,93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ulta</text:p>
          </table:table-cell>
          <table:table-cell office:value-type="float" office:value="0.07738" calcext:value-type="float">
            <text:p>0.08</text:p>
          </table:table-cell>
          <table:table-cell office:value-type="float" office:value="14249558" calcext:value-type="float">
            <text:p>14,249,558</text:p>
          </table:table-cell>
          <table:table-cell office:value-type="float" office:value="126545089" calcext:value-type="float">
            <text:p>126,545,08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lm</text:p>
          </table:table-cell>
          <table:table-cell office:value-type="string" calcext:value-type="string">
            <text:p>golem</text:p>
          </table:table-cell>
          <table:table-cell office:value-type="float" office:value="0.126079" calcext:value-type="float">
            <text:p>0.13</text:p>
          </table:table-cell>
          <table:table-cell office:value-type="float" office:value="5061436" calcext:value-type="float">
            <text:p>5,061,436</text:p>
          </table:table-cell>
          <table:table-cell office:value-type="float" office:value="126120962" calcext:value-type="float">
            <text:p>126,120,96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sentient</text:p>
          </table:table-cell>
          <table:table-cell office:value-type="float" office:value="0.01728521" calcext:value-type="float">
            <text:p>0.02</text:p>
          </table:table-cell>
          <table:table-cell office:value-type="float" office:value="13692493" calcext:value-type="float">
            <text:p>13,692,493</text:p>
          </table:table-cell>
          <table:table-cell office:value-type="float" office:value="125268894" calcext:value-type="float">
            <text:p>125,268,89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1inch</text:p>
          </table:table-cell>
          <table:table-cell office:value-type="float" office:value="0.089268" calcext:value-type="float">
            <text:p>0.09</text:p>
          </table:table-cell>
          <table:table-cell office:value-type="float" office:value="10010785" calcext:value-type="float">
            <text:p>10,010,785</text:p>
          </table:table-cell>
          <table:table-cell office:value-type="float" office:value="125333788" calcext:value-type="float">
            <text:p>125,333,78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n64</text:p>
          </table:table-cell>
          <table:table-cell office:value-type="string" calcext:value-type="string">
            <text:p>chutes</text:p>
          </table:table-cell>
          <table:table-cell office:value-type="float" office:value="26.66" calcext:value-type="float">
            <text:p>26.66</text:p>
          </table:table-cell>
          <table:table-cell office:value-type="float" office:value="1480845" calcext:value-type="float">
            <text:p>1,480,845</text:p>
          </table:table-cell>
          <table:table-cell office:value-type="float" office:value="125661635" calcext:value-type="float">
            <text:p>125,661,63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kt</text:p>
          </table:table-cell>
          <table:table-cell office:value-type="string" calcext:value-type="string">
            <text:p>akash-network</text:p>
          </table:table-cell>
          <table:table-cell office:value-type="float" office:value="0.473533" calcext:value-type="float">
            <text:p>0.47</text:p>
          </table:table-cell>
          <table:table-cell office:value-type="float" office:value="6548753" calcext:value-type="float">
            <text:p>6,548,753</text:p>
          </table:table-cell>
          <table:table-cell office:value-type="float" office:value="124031363" calcext:value-type="float">
            <text:p>124,031,36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string" calcext:value-type="string">
            <text:p>gekko</text:p>
          </table:table-cell>
          <table:table-cell office:value-type="float" office:value="0.000000619032" calcext:value-type="float">
            <text:p>0.00</text:p>
          </table:table-cell>
          <table:table-cell office:value-type="float" office:value="78182" calcext:value-type="float">
            <text:p>78,182</text:p>
          </table:table-cell>
          <table:table-cell office:value-type="float" office:value="123942899" calcext:value-type="float">
            <text:p>123,942,89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gomining</text:p>
          </table:table-cell>
          <table:table-cell office:value-type="string" calcext:value-type="string">
            <text:p>gmt-token</text:p>
          </table:table-cell>
          <table:table-cell office:value-type="float" office:value="0.304226" calcext:value-type="float">
            <text:p>0.30</text:p>
          </table:table-cell>
          <table:table-cell office:value-type="float" office:value="12292424" calcext:value-type="float">
            <text:p>12,292,424</text:p>
          </table:table-cell>
          <table:table-cell office:value-type="float" office:value="123244535" calcext:value-type="float">
            <text:p>123,244,53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ozo</text:p>
          </table:table-cell>
          <table:table-cell office:value-type="string" calcext:value-type="string">
            <text:p>ozone-chain</text:p>
          </table:table-cell>
          <table:table-cell office:value-type="float" office:value="0.128932" calcext:value-type="float">
            <text:p>0.13</text:p>
          </table:table-cell>
          <table:table-cell office:value-type="float" office:value="219424" calcext:value-type="float">
            <text:p>219,424</text:p>
          </table:table-cell>
          <table:table-cell office:value-type="float" office:value="123223000" calcext:value-type="float">
            <text:p>123,223,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sh-4</text:p>
          </table:table-cell>
          <table:table-cell office:value-type="float" office:value="0.998596" calcext:value-type="float">
            <text:p>1.00</text:p>
          </table:table-cell>
          <table:table-cell office:value-type="float" office:value="18237910" calcext:value-type="float">
            <text:p>18,237,910</text:p>
          </table:table-cell>
          <table:table-cell office:value-type="float" office:value="122788933" calcext:value-type="float">
            <text:p>122,788,9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rxusd</text:p>
          </table:table-cell>
          <table:table-cell office:value-type="string" calcext:value-type="string">
            <text:p>frax-usd</text:p>
          </table:table-cell>
          <table:table-cell office:value-type="float" office:value="0.99952" calcext:value-type="float">
            <text:p>1.00</text:p>
          </table:table-cell>
          <table:table-cell office:value-type="float" office:value="2906082" calcext:value-type="float">
            <text:p>2,906,082</text:p>
          </table:table-cell>
          <table:table-cell office:value-type="float" office:value="122482689" calcext:value-type="float">
            <text:p>122,482,68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usdf</text:p>
          </table:table-cell>
          <table:table-cell office:value-type="string" calcext:value-type="string">
            <text:p>astherus-usdf</text:p>
          </table:table-cell>
          <table:table-cell office:value-type="float" office:value="0.998474" calcext:value-type="float">
            <text:p>1.00</text:p>
          </table:table-cell>
          <table:table-cell office:value-type="float" office:value="74401" calcext:value-type="float">
            <text:p>74,401</text:p>
          </table:table-cell>
          <table:table-cell office:value-type="float" office:value="121138584" calcext:value-type="float">
            <text:p>121,138,58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rac</text:p>
          </table:table-cell>
          <table:table-cell office:value-type="string" calcext:value-type="string">
            <text:p>origintrail</text:p>
          </table:table-cell>
          <table:table-cell office:value-type="float" office:value="0.270521" calcext:value-type="float">
            <text:p>0.27</text:p>
          </table:table-cell>
          <table:table-cell office:value-type="float" office:value="6078660" calcext:value-type="float">
            <text:p>6,078,660</text:p>
          </table:table-cell>
          <table:table-cell office:value-type="float" office:value="120992240" calcext:value-type="float">
            <text:p>120,992,24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jto</text:p>
          </table:table-cell>
          <table:table-cell office:value-type="string" calcext:value-type="string">
            <text:p>jito-governance-token</text:p>
          </table:table-cell>
          <table:table-cell office:value-type="float" office:value="0.263697" calcext:value-type="float">
            <text:p>0.26</text:p>
          </table:table-cell>
          <table:table-cell office:value-type="float" office:value="11390829" calcext:value-type="float">
            <text:p>11,390,829</text:p>
          </table:table-cell>
          <table:table-cell office:value-type="float" office:value="119648011" calcext:value-type="float">
            <text:p>119,648,01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usd</text:p>
          </table:table-cell>
          <table:table-cell office:value-type="string" calcext:value-type="string">
            <text:p>pleasing-usd</text:p>
          </table:table-cell>
          <table:table-cell office:value-type="float" office:value="0.9929" calcext:value-type="float">
            <text:p>0.99</text:p>
          </table:table-cell>
          <table:table-cell office:value-type="float" office:value="259.05" calcext:value-type="float">
            <text:p>259</text:p>
          </table:table-cell>
          <table:table-cell office:value-type="float" office:value="119147973" calcext:value-type="float">
            <text:p>119,147,97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luid</text:p>
          </table:table-cell>
          <table:table-cell office:value-type="string" calcext:value-type="string">
            <text:p>instadapp</text:p>
          </table:table-cell>
          <table:table-cell office:value-type="float" office:value="1.52" calcext:value-type="float">
            <text:p>1.52</text:p>
          </table:table-cell>
          <table:table-cell office:value-type="float" office:value="3646677" calcext:value-type="float">
            <text:p>3,646,677</text:p>
          </table:table-cell>
          <table:table-cell office:value-type="float" office:value="118296755" calcext:value-type="float">
            <text:p>118,296,75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emix</text:p>
          </table:table-cell>
          <table:table-cell office:value-type="string" calcext:value-type="string">
            <text:p>wemix-token</text:p>
          </table:table-cell>
          <table:table-cell office:value-type="float" office:value="0.253956" calcext:value-type="float">
            <text:p>0.25</text:p>
          </table:table-cell>
          <table:table-cell office:value-type="float" office:value="1044519" calcext:value-type="float">
            <text:p>1,044,519</text:p>
          </table:table-cell>
          <table:table-cell office:value-type="float" office:value="117385782" calcext:value-type="float">
            <text:p>117,385,78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iusd</text:p>
          </table:table-cell>
          <table:table-cell office:value-type="string" calcext:value-type="string">
            <text:p>infinifi-usd</text:p>
          </table:table-cell>
          <table:table-cell office:value-type="float" office:value="0.998841" calcext:value-type="float">
            <text:p>1.00</text:p>
          </table:table-cell>
          <table:table-cell office:value-type="float" office:value="216059" calcext:value-type="float">
            <text:p>216,059</text:p>
          </table:table-cell>
          <table:table-cell office:value-type="float" office:value="117137327" calcext:value-type="float">
            <text:p>117,137,32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c0000023</text:p>
          </table:table-cell>
          <table:table-cell office:value-type="string" calcext:value-type="string">
            <text:p>tradable-singapore-fintech-ssl-2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office:value-type="float" office:value="114500000" calcext:value-type="float">
            <text:p>114,500,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hfl</text:p>
          </table:table-cell>
          <table:table-cell office:value-type="string" calcext:value-type="string">
            <text:p>shuffle-2</text:p>
          </table:table-cell>
          <table:table-cell office:value-type="float" office:value="0.288351" calcext:value-type="float">
            <text:p>0.29</text:p>
          </table:table-cell>
          <table:table-cell office:value-type="float" office:value="799674" calcext:value-type="float">
            <text:p>799,674</text:p>
          </table:table-cell>
          <table:table-cell office:value-type="float" office:value="114417855" calcext:value-type="float">
            <text:p>114,417,85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ow-protocol</text:p>
          </table:table-cell>
          <table:table-cell office:value-type="float" office:value="0.204213" calcext:value-type="float">
            <text:p>0.20</text:p>
          </table:table-cell>
          <table:table-cell office:value-type="float" office:value="5538453" calcext:value-type="float">
            <text:p>5,538,453</text:p>
          </table:table-cell>
          <table:table-cell office:value-type="float" office:value="114184146" calcext:value-type="float">
            <text:p>114,184,14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immutable-x</text:p>
          </table:table-cell>
          <table:table-cell office:value-type="float" office:value="0.134828" calcext:value-type="float">
            <text:p>0.13</text:p>
          </table:table-cell>
          <table:table-cell office:value-type="float" office:value="12062252" calcext:value-type="float">
            <text:p>12,062,252</text:p>
          </table:table-cell>
          <table:table-cell office:value-type="float" office:value="113642485" calcext:value-type="float">
            <text:p>113,642,48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eurcv</text:p>
          </table:table-cell>
          <table:table-cell office:value-type="string" calcext:value-type="string">
            <text:p>societe-generale-forge-eurcv</text:p>
          </table:table-cell>
          <table:table-cell office:value-type="float" office:value="1.15" calcext:value-type="float">
            <text:p>1.15</text:p>
          </table:table-cell>
          <table:table-cell office:value-type="float" office:value="11705090" calcext:value-type="float">
            <text:p>11,705,090</text:p>
          </table:table-cell>
          <table:table-cell office:value-type="float" office:value="113488059" calcext:value-type="float">
            <text:p>113,488,05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weave</text:p>
          </table:table-cell>
          <table:table-cell office:value-type="float" office:value="1.68" calcext:value-type="float">
            <text:p>1.68</text:p>
          </table:table-cell>
          <table:table-cell office:value-type="float" office:value="17321363" calcext:value-type="float">
            <text:p>17,321,363</text:p>
          </table:table-cell>
          <table:table-cell office:value-type="float" office:value="110422082" calcext:value-type="float">
            <text:p>110,422,08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egld</text:p>
          </table:table-cell>
          <table:table-cell office:value-type="string" calcext:value-type="string">
            <text:p>elrond-erd-2</text:p>
          </table:table-cell>
          <table:table-cell office:value-type="float" office:value="3.71" calcext:value-type="float">
            <text:p>3.71</text:p>
          </table:table-cell>
          <table:table-cell office:value-type="float" office:value="6805427" calcext:value-type="float">
            <text:p>6,805,427</text:p>
          </table:table-cell>
          <table:table-cell office:value-type="float" office:value="110127272" calcext:value-type="float">
            <text:p>110,127,27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eigen</text:p>
          </table:table-cell>
          <table:table-cell office:value-type="string" calcext:value-type="string">
            <text:p>eigenlayer</text:p>
          </table:table-cell>
          <table:table-cell office:value-type="float" office:value="0.159023" calcext:value-type="float">
            <text:p>0.16</text:p>
          </table:table-cell>
          <table:table-cell office:value-type="float" office:value="16866060" calcext:value-type="float">
            <text:p>16,866,060</text:p>
          </table:table-cell>
          <table:table-cell office:value-type="float" office:value="109904839" calcext:value-type="float">
            <text:p>109,904,83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kx</text:p>
          </table:table-cell>
          <table:table-cell office:value-type="string" calcext:value-type="string">
            <text:p>tokenize-xchange</text:p>
          </table:table-cell>
          <table:table-cell office:value-type="float" office:value="1.37" calcext:value-type="float">
            <text:p>1.37</text:p>
          </table:table-cell>
          <table:table-cell office:value-type="float" office:value="3159.08" calcext:value-type="float">
            <text:p>3,159</text:p>
          </table:table-cell>
          <table:table-cell office:value-type="float" office:value="109344213" calcext:value-type="float">
            <text:p>109,344,2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pieverse</text:p>
          </table:table-cell>
          <table:table-cell office:value-type="float" office:value="0.507007" calcext:value-type="float">
            <text:p>0.51</text:p>
          </table:table-cell>
          <table:table-cell office:value-type="float" office:value="5056571" calcext:value-type="float">
            <text:p>5,056,571</text:p>
          </table:table-cell>
          <table:table-cell office:value-type="float" office:value="109005707" calcext:value-type="float">
            <text:p>109,005,70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rlb</text:p>
          </table:table-cell>
          <table:table-cell office:value-type="string" calcext:value-type="string">
            <text:p>rollbit-coin</text:p>
          </table:table-cell>
          <table:table-cell office:value-type="float" office:value="0.063296" calcext:value-type="float">
            <text:p>0.06</text:p>
          </table:table-cell>
          <table:table-cell office:value-type="float" office:value="191197" calcext:value-type="float">
            <text:p>191,197</text:p>
          </table:table-cell>
          <table:table-cell office:value-type="float" office:value="108543344" calcext:value-type="float">
            <text:p>108,543,344</text:p>
          </table:table-cell>
        </table:table-row>
        <table:table-row table:style-name="ro1" table:number-rows-repeated="104832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 style:data-style-name="N2" text:time-value="14:45:59.562253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3T15:08:17.792103600</dc:date>
    <meta:editing-duration>PT30M57S</meta:editing-duration>
    <meta:editing-cycles>10</meta:editing-cycles>
    <meta:generator>LibreOffice/25.8.5.2$Windows_X86_64 LibreOffice_project/9c8b85f387cc00a89945a79c9e6239f32e450ac2</meta:generator>
    <meta:document-statistic meta:table-count="1" meta:cell-count="1506" meta:object-count="0"/>
  </office:meta>
</office:document-meta>
</file>